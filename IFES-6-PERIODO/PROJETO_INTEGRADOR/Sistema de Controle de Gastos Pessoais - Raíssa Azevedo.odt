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5000006267550DFCD.png" manifest:media-type="image/png"/>
  <manifest:file-entry manifest:full-path="Pictures/10000001000002CB00000300EA8FEAA9.png" manifest:media-type="image/png"/>
  <manifest:file-entry manifest:full-path="Pictures/1000000100000237000003861B877970.png" manifest:media-type="image/png"/>
  <manifest:file-entry manifest:full-path="Pictures/1000000100000415000000E5B0CFB6E7.png" manifest:media-type="image/png"/>
  <manifest:file-entry manifest:full-path="Pictures/10000001000002EF0000003831DE1673.png" manifest:media-type="image/png"/>
  <manifest:file-entry manifest:full-path="Pictures/10000001000004BD0000013214435F77.png" manifest:media-type="image/png"/>
  <manifest:file-entry manifest:full-path="Pictures/100000010000035000000224397A8270.png" manifest:media-type="image/png"/>
  <manifest:file-entry manifest:full-path="Pictures/10000001000004D70000005C920679DE.png" manifest:media-type="image/png"/>
  <manifest:file-entry manifest:full-path="Pictures/10000001000005CE000002255779BA73.png" manifest:media-type="image/png"/>
  <manifest:file-entry manifest:full-path="Pictures/10000001000004BC000002CEB1AE3E09.png" manifest:media-type="image/png"/>
  <manifest:file-entry manifest:full-path="Pictures/100000010000036500000191B8E28B05.png" manifest:media-type="image/png"/>
  <manifest:file-entry manifest:full-path="Pictures/100000010000018700000299215A23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Negrito" svg:font-family="'Arial Negrito'" style:font-family-generic="swiss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Parágrafo" style:master-page-name="Standard">
      <style:paragraph-properties fo:margin-right="0cm" fo:line-height="115%" fo:text-align="center" style:justify-single-word="false" fo:text-indent="0cm" style:auto-text-indent="false" style:page-number="0"/>
      <style:text-properties style:font-name="Times New Roman" fo:font-size="12pt" fo:font-weight="bold" officeooo:rsid="000cb001" officeooo:paragraph-rsid="000cb001" style:font-size-asian="12pt" style:font-weight-asian="bold" style:font-size-complex="12pt"/>
    </style:style>
    <style:style style:name="P2" style:family="paragraph" style:parent-style-name="Standard">
      <style:paragraph-properties fo:margin-right="0cm" fo:line-height="115%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right="0cm" fo:line-height="115%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Arial" style:font-size-complex="12pt"/>
    </style:style>
    <style:style style:name="P4" style:family="paragraph" style:parent-style-name="Standard">
      <style:paragraph-properties fo:margin-right="0cm" fo:line-height="115%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5" style:family="paragraph" style:parent-style-name="Text_20_body">
      <style:paragraph-properties fo:margin-right="0cm" fo:line-height="115%" fo:text-align="center" style:justify-single-word="false" fo:text-indent="0cm" style:auto-text-indent="false"/>
      <style:text-properties fo:font-weight="bold" officeooo:paragraph-rsid="000cb001" style:font-weight-asian="bold" style:font-name-complex="Arial" style:font-size-complex="12pt"/>
    </style:style>
    <style:style style:name="P6" style:family="paragraph" style:parent-style-name="Standard">
      <style:paragraph-properties fo:margin-right="0cm" fo:line-height="115%" fo:text-align="center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7" style:family="paragraph" style:parent-style-name="PPGEC_3a__20_linha_20_em_20_branco">
      <style:paragraph-properties fo:margin-right="0cm" fo:line-height="115%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Arial" style:font-size-complex="12pt"/>
    </style:style>
    <style:style style:name="P8" style:family="paragraph" style:parent-style-name="Standard">
      <style:paragraph-properties fo:margin-right="0cm" fo:line-height="115%" fo:text-align="center" style:justify-single-word="false" fo:text-indent="0cm" style:auto-text-indent="false"/>
      <style:text-properties style:font-name="Times New Roman" fo:font-size="12pt" fo:font-weight="bold" officeooo:rsid="000cb001" officeooo:paragraph-rsid="000cb001" style:font-size-asian="12pt" style:font-weight-asian="bold" style:font-size-complex="12pt"/>
    </style:style>
    <style:style style:name="P9" style:family="paragraph" style:parent-style-name="Standard" style:list-style-name="" style:master-page-name="Converter_20_1">
      <style:paragraph-properties fo:margin-right="0cm" fo:line-height="115%" fo:text-align="justify" style:justify-single-word="false" fo:text-indent="0cm" style:auto-text-indent="false" style:page-number="auto"/>
      <style:text-properties style:font-name="Times New Roman" fo:font-size="12pt" fo:font-weight="bold" style:font-size-asian="12pt" style:font-weight-asian="bold" style:font-name-complex="Arial" style:font-size-complex="12pt"/>
    </style:style>
    <style:style style:name="P10" style:family="paragraph" style:parent-style-name="Standard" style:list-style-name="">
      <style:paragraph-properties fo:margin-right="0cm" fo:line-height="115%" fo:text-align="center" style:justify-single-word="false" fo:text-indent="0cm" style:auto-text-indent="false"/>
      <style:text-properties style:font-name="Times New Roman" fo:font-size="12pt" style:font-size-asian="12pt" style:font-name-complex="Arial" style:font-size-complex="12pt"/>
    </style:style>
    <style:style style:name="P11" style:family="paragraph" style:parent-style-name="Standard">
      <style:paragraph-properties fo:margin-right="0cm" fo:line-height="115%" fo:text-align="center" style:justify-single-word="false" fo:text-indent="0cm" style:auto-text-indent="false"/>
      <style:text-properties style:font-name="Times New Roman" fo:font-size="12pt" style:font-size-asian="12pt" style:font-name-complex="Arial" style:font-size-complex="12pt"/>
    </style:style>
    <style:style style:name="P12" style:family="paragraph" style:parent-style-name="Standard">
      <style:paragraph-properties fo:margin-left="8.001cm" fo:margin-right="0cm" fo:line-height="115%" fo:text-align="end" style:justify-single-word="false" fo:text-indent="0cm" style:auto-text-indent="false"/>
      <style:text-properties fo:color="#ffffff" loext:opacity="100%" style:font-name="Times New Roman" fo:font-size="12pt" style:font-size-asian="12pt" style:font-size-complex="12pt"/>
    </style:style>
    <style:style style:name="P13" style:family="paragraph" style:parent-style-name="Standard">
      <style:paragraph-properties fo:margin-left="8.001cm" fo:margin-right="0cm" fo:line-height="115%" fo:text-align="end" style:justify-single-word="false" fo:text-indent="0cm" style:auto-text-indent="false"/>
      <style:text-properties fo:color="#ffffff" loext:opacity="100%" style:font-name="Times New Roman" fo:font-size="12pt" style:font-size-asian="12pt" style:font-name-complex="Arial" style:font-size-complex="12pt"/>
    </style:style>
    <style:style style:name="P14" style:family="paragraph" style:parent-style-name="Standard">
      <style:paragraph-properties fo:margin-left="8.001cm" fo:margin-right="0cm" fo:line-height="115%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Arial" style:font-size-complex="12pt"/>
    </style:style>
    <style:style style:name="P15" style:family="paragraph" style:parent-style-name="Standard">
      <style:paragraph-properties fo:margin-right="0cm" fo:line-height="115%" fo:text-align="center" style:justify-single-word="false" fo:text-indent="0cm" style:auto-text-indent="false"/>
      <style:text-properties style:font-name="Times New Roman" fo:font-size="12pt" officeooo:rsid="000d4d1c" officeooo:paragraph-rsid="000d4d1c" style:font-size-asian="12pt" style:font-size-complex="12pt"/>
    </style:style>
    <style:style style:name="P16" style:family="paragraph" style:parent-style-name="Standard" style:master-page-name="Converter_20_2">
      <style:paragraph-properties fo:margin-right="0cm" fo:margin-top="0cm" fo:margin-bottom="0.635cm" style:contextual-spacing="false" fo:line-height="115%" fo:text-align="center" style:justify-single-word="false" fo:text-indent="0cm" style:auto-text-indent="false" style:page-number="auto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7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9" style:family="paragraph" style:parent-style-name="PPGEC_3a__20_linha_20_em_20_branco">
      <style:paragraph-properties fo:margin-right="0cm" fo:line-height="115%" fo:text-align="justify" style:justify-single-word="false" fo:text-indent="0cm" style:auto-text-indent="false"/>
      <style:text-properties fo:text-transform="uppercase" fo:color="#ff0000" loext:opacity="100%" style:font-name="Times New Roman" fo:font-size="12pt" fo:language="none" fo:country="none" fo:font-weight="bold" style:letter-kerning="true" style:font-size-asian="12pt" style:language-asian="none" style:country-asian="none" style:font-weight-asian="bold" style:font-name-complex="Arial" style:font-size-complex="12pt"/>
    </style:style>
    <style:style style:name="P20" style:family="paragraph" style:parent-style-name="PPGEC_3a__20_linha_20_em_20_branco">
      <style:paragraph-properties fo:margin-right="0cm" fo:line-height="115%" fo:text-align="justify" style:justify-single-word="false" fo:text-indent="0cm" style:auto-text-indent="false"/>
      <style:text-properties fo:color="#ff0000" loext:opacity="100%" style:font-name="Times New Roman" fo:font-size="12pt" fo:font-weight="bold" style:font-size-asian="12pt" style:font-weight-asian="bold" style:font-name-complex="Arial" style:font-size-complex="12pt"/>
    </style:style>
    <style:style style:name="P21" style:family="paragraph" style:parent-style-name="PPGEC_3a__20_linha_20_em_20_branco">
      <style:paragraph-properties fo:margin-right="0cm" fo:line-height="115%" fo:text-align="justify" style:justify-single-word="false" fo:text-indent="0cm" style:auto-text-indent="false"/>
      <style:text-properties style:font-name="Times New Roman" fo:font-size="12pt" fo:language="none" fo:country="none" style:font-size-asian="12pt" style:language-asian="none" style:country-asian="none" style:font-size-complex="12pt"/>
    </style:style>
    <style:style style:name="P22" style:family="paragraph" style:parent-style-name="PPGEC_3a__20_linha_20_em_20_branco">
      <style:paragraph-properties fo:margin-right="0cm" fo:line-height="115%" fo:text-align="justify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Arial" style:font-size-complex="12pt"/>
    </style:style>
    <style:style style:name="P23" style:family="paragraph" style:parent-style-name="Heading_20_1" style:master-page-name="Converter_20_3">
      <style:paragraph-properties fo:line-height="115%" fo:text-align="justify" style:justify-single-word="false" style:page-number="auto"/>
      <style:text-properties style:font-name="Times New Roman" fo:font-size="12pt" style:font-size-asian="12pt" style:font-size-complex="12pt"/>
    </style:style>
    <style:style style:name="P24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style:font-name="Times New Roman" fo:font-size="12pt" officeooo:paragraph-rsid="000ef14e" style:font-size-asian="12pt" style:font-size-complex="12pt"/>
    </style:style>
    <style:style style:name="P25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style:font-name="Times New Roman" fo:font-size="12pt" officeooo:paragraph-rsid="001098a3" style:font-size-asian="12pt" style:font-size-complex="12pt"/>
    </style:style>
    <style:style style:name="P26" style:family="paragraph" style:parent-style-name="Text_20_body">
      <style:paragraph-properties fo:margin-right="0cm" fo:line-height="150%" fo:text-align="justify" style:justify-single-word="false" fo:text-indent="0cm" style:auto-text-indent="false"/>
      <style:text-properties style:font-name="Times New Roman" officeooo:paragraph-rsid="000ef14e" style:font-size-complex="12pt"/>
    </style:style>
    <style:style style:name="P27" style:family="paragraph" style:parent-style-name="Text_20_body">
      <style:paragraph-properties fo:margin-right="0cm" fo:line-height="150%" fo:text-align="justify" style:justify-single-word="false" fo:text-indent="0cm" style:auto-text-indent="false"/>
      <style:text-properties style:font-name="Times New Roman" officeooo:paragraph-rsid="001098a3" style:font-size-complex="12pt"/>
    </style:style>
    <style:style style:name="P28" style:family="paragraph" style:parent-style-name="Standard">
      <style:paragraph-properties fo:margin-right="0cm" fo:line-height="115%" fo:text-align="justify" style:justify-single-word="false" fo:text-indent="0cm" style:auto-text-indent="false"/>
      <style:text-properties style:font-name="Times New Roman" fo:font-size="12pt" officeooo:paragraph-rsid="000ef14e" style:font-size-asian="12pt" style:font-size-complex="12pt"/>
    </style:style>
    <style:style style:name="P29" style:family="paragraph" style:parent-style-name="Heading_20_1" style:master-page-name="Converter_20_4">
      <style:paragraph-properties fo:line-height="115%" fo:text-align="justify" style:justify-single-word="false" style:page-number="auto">
        <style:tab-stops>
          <style:tab-stop style:position="8.856cm"/>
        </style:tab-stops>
      </style:paragraph-properties>
      <style:text-properties style:font-name="Times New Roman" fo:font-size="12pt" style:font-size-asian="12pt" style:font-size-complex="12pt"/>
    </style:style>
    <style:style style:name="P30" style:family="paragraph" style:parent-style-name="Text_20_body">
      <style:paragraph-properties fo:margin-right="0cm" fo:line-height="115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31" style:family="paragraph" style:parent-style-name="Text_20_body" style:list-style-name="L1">
      <style:paragraph-properties fo:line-height="115%"/>
      <style:text-properties style:font-name="Times New Roman" style:font-size-complex="12pt"/>
    </style:style>
    <style:style style:name="P32" style:family="paragraph" style:parent-style-name="Standard">
      <style:paragraph-properties fo:margin-right="0cm" fo:line-height="115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33" style:family="paragraph" style:parent-style-name="Standard">
      <style:paragraph-properties fo:margin-right="0cm" fo:line-height="115%" fo:text-align="justify" style:justify-single-word="false" fo:text-indent="0cm" style:auto-text-indent="false"/>
      <style:text-properties style:font-name="Times New Roman" fo:font-size="12pt" style:font-size-asian="12pt" style:font-name-complex="Arial" style:font-size-complex="12pt"/>
    </style:style>
    <style:style style:name="P34" style:family="paragraph" style:parent-style-name="Heading_20_1">
      <style:paragraph-properties fo:line-height="115%" fo:text-align="justify" style:justify-single-word="false"/>
      <style:text-properties style:font-name="Times New Roman" fo:font-size="12pt" style:font-size-asian="12pt" style:font-size-complex="12pt"/>
    </style:style>
    <style:style style:name="P35" style:family="paragraph" style:parent-style-name="Text_20_body">
      <style:paragraph-properties fo:line-height="115%" fo:text-align="justify" style:justify-single-word="false"/>
      <style:text-properties style:font-name="Times New Roman" fo:font-size="12pt" officeooo:rsid="000ef14e" style:font-size-asian="12pt" style:font-size-complex="12pt"/>
    </style:style>
    <style:style style:name="P36" style:family="paragraph" style:parent-style-name="Text_20_body">
      <style:paragraph-properties fo:line-height="115%"/>
      <style:text-properties style:font-name="Times New Roman" officeooo:rsid="000ef14e" style:font-size-complex="12pt"/>
    </style:style>
    <style:style style:name="P37" style:family="paragraph" style:parent-style-name="Text_20_body" style:list-style-name="L2">
      <style:paragraph-properties fo:line-height="115%"/>
      <style:text-properties style:font-name="Times New Roman" officeooo:rsid="000ef14e" style:font-size-complex="12pt"/>
    </style:style>
    <style:style style:name="P38" style:family="paragraph" style:parent-style-name="Standard">
      <style:paragraph-properties fo:line-height="115%" fo:text-align="justify" style:justify-single-word="false"/>
      <style:text-properties style:font-name="Times New Roman" fo:font-size="12pt" style:font-size-asian="12pt" style:font-size-complex="12pt"/>
    </style:style>
    <style:style style:name="P39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00ef14e" style:font-size-asian="12pt" style:font-size-complex="12pt"/>
    </style:style>
    <style:style style:name="P40" style:family="paragraph" style:parent-style-name="Text_20_body" style:list-style-name="L3">
      <style:paragraph-properties fo:line-height="150%"/>
      <style:text-properties style:font-name="Times New Roman" officeooo:rsid="000ef14e" style:font-size-complex="12pt"/>
    </style:style>
    <style:style style:name="P41" style:family="paragraph" style:parent-style-name="Text_20_body">
      <style:paragraph-properties fo:line-height="150%"/>
      <style:text-properties style:font-name="Times New Roman" officeooo:rsid="000ef14e" style:font-size-complex="12pt"/>
    </style:style>
    <style:style style:name="P42" style:family="paragraph" style:parent-style-name="Standard">
      <style:paragraph-properties fo:line-height="115%" fo:text-align="justify" style:justify-single-word="false"/>
      <style:text-properties style:font-name="Times New Roman" fo:font-size="12pt" officeooo:rsid="000ef14e" style:font-size-asian="12pt" style:font-size-complex="12pt"/>
    </style:style>
    <style:style style:name="P43" style:family="paragraph" style:parent-style-name="Heading_20_1">
      <style:paragraph-properties fo:line-height="115%" fo:text-align="justify" style:justify-single-word="false"/>
      <style:text-properties style:font-name="Times New Roman" fo:font-size="12pt" officeooo:paragraph-rsid="00101a7f" style:font-size-asian="12pt" style:font-size-complex="12pt"/>
    </style:style>
    <style:style style:name="P44" style:family="paragraph" style:parent-style-name="Heading_20_3">
      <style:paragraph-properties fo:line-height="115%" fo:text-align="justify" style:justify-single-word="false"/>
      <style:text-properties style:font-name="Times New Roman" fo:font-size="12pt" fo:font-weight="bold" officeooo:rsid="00101a7f" officeooo:paragraph-rsid="00101a7f" style:font-size-asian="12pt" style:font-weight-asian="bold" style:font-name-complex="Arial" style:font-size-complex="12pt" style:font-weight-complex="bold"/>
    </style:style>
    <style:style style:name="P45" style:family="paragraph" style:parent-style-name="Text_20_body">
      <style:paragraph-properties fo:line-height="115%"/>
      <style:text-properties style:font-name="Times New Roman" officeooo:rsid="00101a7f" style:font-size-complex="12pt"/>
    </style:style>
    <style:style style:name="P46" style:family="paragraph" style:parent-style-name="Text_20_body" style:list-style-name="L4">
      <style:paragraph-properties fo:line-height="115%"/>
      <style:text-properties style:font-name="Times New Roman" officeooo:rsid="00101a7f" style:font-size-complex="12pt"/>
    </style:style>
    <style:style style:name="P47" style:family="paragraph" style:parent-style-name="Heading_20_3">
      <style:paragraph-properties fo:line-height="115%"/>
      <style:text-properties style:font-name="Times New Roman" fo:font-weight="bold" officeooo:rsid="00101a7f" style:font-weight-asian="bold" style:font-name-complex="Arial" style:font-size-complex="12pt" style:font-weight-complex="bold"/>
    </style:style>
    <style:style style:name="P48" style:family="paragraph" style:parent-style-name="Text_20_body" style:list-style-name="L5">
      <style:paragraph-properties fo:line-height="115%"/>
      <style:text-properties style:font-name="Times New Roman" officeooo:rsid="00101a7f" style:font-size-complex="12pt"/>
    </style:style>
    <style:style style:name="P49" style:family="paragraph" style:parent-style-name="Text_20_body" style:list-style-name="L5">
      <style:paragraph-properties fo:margin-left="0cm" fo:line-height="115%" fo:text-indent="0cm" style:auto-text-indent="false"/>
      <style:text-properties style:font-name="Times New Roman" officeooo:rsid="00101a7f" style:font-size-complex="12pt"/>
    </style:style>
    <style:style style:name="P50" style:family="paragraph" style:parent-style-name="Standard">
      <style:paragraph-properties fo:line-height="115%" fo:text-align="justify" style:justify-single-word="false"/>
      <style:text-properties style:font-name="Times New Roman" fo:font-size="12pt" officeooo:rsid="00101a7f" officeooo:paragraph-rsid="00101a7f" style:font-size-asian="12pt" style:font-size-complex="12pt"/>
    </style:style>
    <style:style style:name="P51" style:family="paragraph" style:parent-style-name="Heading_20_1">
      <style:paragraph-properties fo:line-height="115%" fo:text-align="justify" style:justify-single-word="false"/>
      <style:text-properties style:font-name="Times New Roman" fo:font-size="12pt" officeooo:paragraph-rsid="001046b2" style:font-size-asian="12pt" style:font-size-complex="12pt"/>
    </style:style>
    <style:style style:name="P52" style:family="paragraph" style:parent-style-name="Text_20_body">
      <style:paragraph-properties fo:line-height="115%" fo:text-align="justify" style:justify-single-word="false"/>
      <style:text-properties style:font-name="Times New Roman" fo:font-size="12pt" officeooo:rsid="001046b2" officeooo:paragraph-rsid="001046b2" style:font-size-asian="12pt" style:font-size-complex="12pt"/>
    </style:style>
    <style:style style:name="P53" style:family="paragraph" style:parent-style-name="Text_20_body" style:list-style-name="L6">
      <style:paragraph-properties fo:line-height="115%"/>
      <style:text-properties style:font-name="Times New Roman" officeooo:rsid="001046b2" style:font-size-complex="12pt"/>
    </style:style>
    <style:style style:name="P54" style:family="paragraph" style:parent-style-name="Text_20_body" style:list-style-name="L7">
      <style:paragraph-properties fo:line-height="115%"/>
      <style:text-properties style:font-name="Times New Roman" officeooo:rsid="001046b2" style:font-size-complex="12pt"/>
    </style:style>
    <style:style style:name="P55" style:family="paragraph" style:parent-style-name="Text_20_body" style:list-style-name="L8">
      <style:paragraph-properties fo:line-height="115%"/>
      <style:text-properties style:font-name="Times New Roman" officeooo:rsid="001046b2" style:font-size-complex="12pt"/>
    </style:style>
    <style:style style:name="P56" style:family="paragraph" style:parent-style-name="Text_20_body" style:list-style-name="L9">
      <style:paragraph-properties fo:line-height="115%"/>
      <style:text-properties style:font-name="Times New Roman" officeooo:rsid="001046b2" style:font-size-complex="12pt"/>
    </style:style>
    <style:style style:name="P57" style:family="paragraph" style:parent-style-name="Text_20_body" style:list-style-name="L10">
      <style:paragraph-properties fo:line-height="115%"/>
      <style:text-properties style:font-name="Times New Roman" officeooo:rsid="001046b2" style:font-size-complex="12pt"/>
    </style:style>
    <style:style style:name="P58" style:family="paragraph" style:parent-style-name="Text_20_body" style:list-style-name="L11">
      <style:paragraph-properties fo:line-height="115%"/>
      <style:text-properties style:font-name="Times New Roman" officeooo:rsid="001046b2" style:font-size-complex="12pt"/>
    </style:style>
    <style:style style:name="P59" style:family="paragraph" style:parent-style-name="Text_20_body" style:list-style-name="L12">
      <style:paragraph-properties fo:line-height="115%"/>
      <style:text-properties style:font-name="Times New Roman" officeooo:rsid="001046b2" style:font-size-complex="12pt"/>
    </style:style>
    <style:style style:name="P60" style:family="paragraph" style:parent-style-name="Standard">
      <style:paragraph-properties fo:line-height="115%" fo:text-align="center" style:justify-single-word="false"/>
      <style:text-properties style:font-name="Times New Roman" fo:font-size="12pt" officeooo:rsid="001046b2" officeooo:paragraph-rsid="001046b2" style:font-size-asian="12pt" style:font-size-complex="12pt"/>
    </style:style>
    <style:style style:name="P61" style:family="paragraph" style:parent-style-name="Standard">
      <style:paragraph-properties fo:line-height="115%" fo:text-align="justify" style:justify-single-word="false"/>
      <style:text-properties style:font-name="Times New Roman" fo:font-size="12pt" officeooo:rsid="001046b2" officeooo:paragraph-rsid="001046b2" style:font-size-asian="12pt" style:font-size-complex="12pt"/>
    </style:style>
    <style:style style:name="P62" style:family="paragraph" style:parent-style-name="Heading_20_1">
      <style:paragraph-properties fo:line-height="115%" fo:text-align="justify" style:justify-single-word="false"/>
      <style:text-properties style:font-name="Times New Roman" fo:font-size="12pt" officeooo:paragraph-rsid="001098a3" style:font-size-asian="12pt" style:font-size-complex="12pt"/>
    </style:style>
    <style:style style:name="P63" style:family="paragraph" style:parent-style-name="Heading_20_3">
      <style:paragraph-properties fo:line-height="115%" fo:text-align="justify" style:justify-single-word="false"/>
      <style:text-properties style:font-name="Times New Roman" fo:font-size="12pt" officeooo:rsid="001098a3" officeooo:paragraph-rsid="001098a3" style:font-size-asian="12pt" style:font-name-complex="Arial" style:font-size-complex="12pt"/>
    </style:style>
    <style:style style:name="P64" style:family="paragraph" style:parent-style-name="Text_20_body">
      <style:paragraph-properties fo:margin-left="0cm" fo:line-height="115%" fo:text-indent="0cm" style:auto-text-indent="false"/>
      <style:text-properties style:font-name="Times New Roman" officeooo:rsid="001098a3" officeooo:paragraph-rsid="00117aac" style:font-size-complex="12pt"/>
    </style:style>
    <style:style style:name="P65" style:family="paragraph" style:parent-style-name="Text_20_body" style:list-style-name="L13">
      <style:paragraph-properties fo:line-height="115%"/>
      <style:text-properties style:font-name="Times New Roman" officeooo:rsid="001098a3" officeooo:paragraph-rsid="00117aac" style:font-size-complex="12pt"/>
    </style:style>
    <style:style style:name="P66" style:family="paragraph" style:parent-style-name="Text_20_body">
      <style:paragraph-properties fo:line-height="115%"/>
      <style:text-properties style:font-name="Times New Roman" officeooo:rsid="001098a3" officeooo:paragraph-rsid="00117aac" style:font-size-complex="12pt"/>
    </style:style>
    <style:style style:name="P67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style:font-name="Times New Roman" fo:font-size="12pt" officeooo:rsid="001098a3" officeooo:paragraph-rsid="001098a3" style:font-size-asian="12pt" style:font-size-complex="12pt"/>
    </style:style>
    <style:style style:name="P68" style:family="paragraph" style:parent-style-name="Heading_20_3">
      <style:paragraph-properties fo:margin-left="0cm" fo:line-height="115%" fo:text-align="justify" style:justify-single-word="false" fo:text-indent="0cm" style:auto-text-indent="false"/>
      <style:text-properties style:font-name="Times New Roman" fo:font-size="12pt" officeooo:rsid="001098a3" officeooo:paragraph-rsid="001098a3" style:font-size-asian="12pt" style:font-name-complex="Arial" style:font-size-complex="12pt"/>
    </style:style>
    <style:style style:name="P69" style:family="paragraph" style:parent-style-name="Text_20_body">
      <style:paragraph-properties fo:margin-left="0cm" fo:line-height="115%" fo:text-indent="0cm" style:auto-text-indent="false"/>
      <style:text-properties style:font-name="Times New Roman" officeooo:rsid="001098a3" style:font-size-complex="12pt"/>
    </style:style>
    <style:style style:name="P70" style:family="paragraph" style:parent-style-name="Heading_20_3">
      <style:paragraph-properties fo:margin-left="0cm" fo:line-height="115%" fo:text-indent="0cm" style:auto-text-indent="false"/>
      <style:text-properties style:font-name="Times New Roman" officeooo:rsid="001098a3" style:font-name-complex="Arial" style:font-size-complex="12pt"/>
    </style:style>
    <style:style style:name="P71" style:family="paragraph" style:parent-style-name="Text_20_body" style:list-style-name="L14">
      <style:paragraph-properties fo:line-height="115%"/>
      <style:text-properties style:font-name="Times New Roman" officeooo:rsid="001098a3" officeooo:paragraph-rsid="00117aac" style:font-size-complex="12pt"/>
    </style:style>
    <style:style style:name="P72" style:family="paragraph" style:parent-style-name="Text_20_body">
      <style:paragraph-properties fo:line-height="115%"/>
      <style:text-properties style:font-name="Times New Roman" officeooo:rsid="001098a3" style:font-size-complex="12pt"/>
    </style:style>
    <style:style style:name="P73" style:family="paragraph" style:parent-style-name="Text_20_body">
      <style:paragraph-properties fo:margin-left="0cm" fo:text-indent="0cm" style:auto-text-indent="false"/>
      <style:text-properties style:font-name="Times New Roman" officeooo:rsid="001098a3" style:font-size-complex="12pt"/>
    </style:style>
    <style:style style:name="P74" style:family="paragraph" style:parent-style-name="Heading_20_4">
      <style:paragraph-properties fo:margin-top="0.353cm" fo:margin-bottom="0.499cm" style:contextual-spacing="false" fo:line-height="115%"/>
      <style:text-properties style:font-name="Times New Roman" officeooo:rsid="001098a3" officeooo:paragraph-rsid="00117aac" style:font-size-complex="12pt"/>
    </style:style>
    <style:style style:name="P75" style:family="paragraph" style:parent-style-name="Heading_20_4" style:list-style-name="L15">
      <style:paragraph-properties fo:margin-top="0.353cm" fo:margin-bottom="0.499cm" style:contextual-spacing="false" fo:line-height="115%"/>
      <style:text-properties style:font-name="Times New Roman" officeooo:rsid="001098a3" officeooo:paragraph-rsid="00117aac" style:font-size-complex="12pt"/>
    </style:style>
    <style:style style:name="P76" style:family="paragraph" style:parent-style-name="Heading_20_4">
      <style:paragraph-properties fo:margin-top="0.353cm" fo:margin-bottom="0.499cm" style:contextual-spacing="false" fo:line-height="115%"/>
      <style:text-properties style:use-window-font-color="true" loext:opacity="0%" style:font-name="Times New Roman" officeooo:rsid="001098a3" style:font-name-complex="Arial" style:font-size-complex="12pt"/>
    </style:style>
    <style:style style:name="P77" style:family="paragraph" style:parent-style-name="Text_20_body">
      <style:paragraph-properties fo:margin-left="0cm" fo:text-indent="0cm" style:auto-text-indent="false"/>
      <style:text-properties style:font-name="Times New Roman" officeooo:rsid="001098a3" officeooo:paragraph-rsid="00117aac" style:font-size-complex="12pt"/>
    </style:style>
    <style:style style:name="P78" style:family="paragraph" style:parent-style-name="Text_20_body" style:list-style-name="L16">
      <style:text-properties style:font-name="Times New Roman" officeooo:rsid="001098a3" officeooo:paragraph-rsid="00117aac" style:font-size-complex="12pt"/>
    </style:style>
    <style:style style:name="P79" style:family="paragraph" style:parent-style-name="Heading_20_3">
      <style:paragraph-properties fo:line-height="115%"/>
      <style:text-properties style:font-name="Times New Roman" officeooo:rsid="001098a3" style:font-size-complex="12pt"/>
    </style:style>
    <style:style style:name="P80" style:family="paragraph" style:parent-style-name="Text_20_body" style:list-style-name="L17">
      <style:text-properties style:font-name="Times New Roman" officeooo:rsid="001098a3" officeooo:paragraph-rsid="00117aac" style:font-size-complex="12pt"/>
    </style:style>
    <style:style style:name="P81" style:family="paragraph" style:parent-style-name="Text_20_body" style:list-style-name="L18">
      <style:text-properties style:font-name="Times New Roman" officeooo:rsid="001098a3" officeooo:paragraph-rsid="00117aac" style:font-size-complex="12pt"/>
    </style:style>
    <style:style style:name="P82" style:family="paragraph" style:parent-style-name="Heading_20_3">
      <style:paragraph-properties fo:line-height="115%"/>
      <style:text-properties style:font-name="Times New Roman" officeooo:rsid="001098a3" style:font-name-complex="Arial" style:font-size-complex="12pt"/>
    </style:style>
    <style:style style:name="P83" style:family="paragraph" style:parent-style-name="Heading_20_1" style:master-page-name="Converter_20_3">
      <style:paragraph-properties fo:line-height="115%" fo:text-align="justify" style:justify-single-word="false" style:page-number="auto"/>
      <style:text-properties style:font-name="Times New Roman" fo:font-size="12pt" officeooo:paragraph-rsid="001353e5" style:font-size-asian="12pt" style:font-size-complex="12pt"/>
    </style:style>
    <style:style style:name="P84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style:font-name="Times New Roman" fo:font-size="12pt" officeooo:rsid="001353e5" officeooo:paragraph-rsid="001353e5" style:font-size-asian="12pt" style:font-size-complex="12pt"/>
    </style:style>
    <style:style style:name="P85" style:family="paragraph" style:parent-style-name="Standard" style:list-style-name="L19">
      <style:paragraph-properties fo:line-height="115%" fo:text-align="justify" style:justify-single-word="false"/>
      <style:text-properties style:font-name="Times New Roman" fo:font-size="12pt" officeooo:rsid="001353e5" officeooo:paragraph-rsid="001353e5" style:font-size-asian="12pt" style:font-size-complex="12pt"/>
    </style:style>
    <style:style style:name="P86" style:family="paragraph" style:parent-style-name="Standard" style:list-style-name="L19">
      <loext:graphic-properties draw:fill="solid" draw:fill-color="#282a36" draw:opacity="100%"/>
      <style:paragraph-properties ch2_options="{'Style': 'dracula', 'Language': 'Python', 'UseCharStyles': 1, 'LineNumberRatio': 100, 'LineNumberStart': 1, 'MasterCharStyle': '', 'ShowLineNumbers': 0, 'ColourizeBackground': 1, 'LineNumberSeparator': '  ', 'LineNumberPaddingSymbol': '', 'StoreOptionsWithSnippet': 1}" fo:line-height="115%" fo:text-align="justify" style:justify-single-word="false" fo:background-color="#282a36"/>
      <style:text-properties style:use-window-font-color="true" loext:opacity="0%" style:font-name="Times New Roman" fo:font-size="12pt" fo:language="zxx" fo:country="none" fo:font-style="normal" style:text-underline-style="none" fo:font-weight="normal" officeooo:rsid="001353e5" officeooo:paragraph-rsid="001353e5" fo:background-color="transparent" style:font-size-asian="12pt" style:font-size-complex="12pt"/>
    </style:style>
    <style:style style:name="P87" style:family="paragraph" style:parent-style-name="Standard" style:list-style-name="L19">
      <style:paragraph-properties fo:line-height="115%" fo:text-align="justify" style:justify-single-word="false"/>
      <style:text-properties style:font-name="Times New Roman" fo:font-size="12pt" officeooo:rsid="00199763" officeooo:paragraph-rsid="00199763" style:font-size-asian="12pt" style:font-size-complex="12pt"/>
    </style:style>
    <style:style style:name="P88" style:family="paragraph" style:parent-style-name="Heading_20_1" style:master-page-name="Converter_20_3">
      <style:paragraph-properties fo:line-height="115%" fo:text-align="justify" style:justify-single-word="false" style:page-number="auto"/>
      <style:text-properties style:font-name="Times New Roman" fo:font-size="12pt" officeooo:paragraph-rsid="00176b39" style:font-size-asian="12pt" style:font-size-complex="12pt"/>
    </style:style>
    <style:style style:name="P89" style:family="paragraph" style:parent-style-name="Standard" style:list-style-name="L20">
      <style:paragraph-properties fo:line-height="115%" fo:text-align="justify" style:justify-single-word="false"/>
      <style:text-properties style:font-name="Times New Roman" fo:font-size="12pt" officeooo:rsid="00176b39" officeooo:paragraph-rsid="00176b39" style:font-size-asian="12pt" style:font-size-complex="12pt"/>
    </style:style>
    <style:style style:name="P90" style:family="paragraph" style:parent-style-name="Standard">
      <style:paragraph-properties fo:line-height="115%" fo:text-align="justify" style:justify-single-word="false"/>
      <style:text-properties style:font-name="Times New Roman" fo:font-size="12pt" officeooo:paragraph-rsid="00176b39" style:font-size-asian="12pt" style:font-size-complex="12pt"/>
    </style:style>
    <style:style style:name="P91" style:family="paragraph" style:parent-style-name="Standard" style:list-style-name="L21">
      <style:paragraph-properties fo:line-height="115%" fo:text-align="justify" style:justify-single-word="false"/>
      <style:text-properties style:font-name="Times New Roman" fo:font-size="12pt" officeooo:rsid="00176b39" officeooo:paragraph-rsid="00176b39" style:font-size-asian="12pt" style:font-size-complex="12pt"/>
    </style:style>
    <style:style style:name="P92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style:font-name="Times New Roman" fo:font-size="12pt" officeooo:rsid="00176b39" officeooo:paragraph-rsid="00176b39" style:font-size-asian="12pt" style:font-size-complex="12pt"/>
    </style:style>
    <style:style style:name="P93" style:family="paragraph" style:parent-style-name="Standard" style:list-style-name="L22">
      <style:paragraph-properties fo:line-height="115%" fo:text-align="justify" style:justify-single-word="false"/>
      <style:text-properties style:font-name="Times New Roman" fo:font-size="12pt" officeooo:rsid="00176b39" officeooo:paragraph-rsid="00176b39" style:font-size-asian="12pt" style:font-size-complex="12pt"/>
    </style:style>
    <style:style style:name="P94" style:family="paragraph" style:parent-style-name="Standard">
      <style:paragraph-properties fo:line-height="115%" fo:text-align="justify" style:justify-single-word="false"/>
      <style:text-properties style:font-name="Times New Roman" fo:font-size="12pt" officeooo:rsid="00176b39" officeooo:paragraph-rsid="00176b39" style:font-size-asian="12pt" style:font-size-complex="12pt"/>
    </style:style>
    <style:style style:name="P95" style:family="paragraph" style:parent-style-name="Standard" style:list-style-name="L22">
      <style:paragraph-properties fo:margin-left="0cm" fo:line-height="115%" fo:text-align="justify" style:justify-single-word="false" fo:text-indent="0cm" style:auto-text-indent="false"/>
      <style:text-properties style:font-name="Times New Roman" fo:font-size="12pt" officeooo:rsid="00176b39" officeooo:paragraph-rsid="00176b39" style:font-size-asian="12pt" style:font-size-complex="12pt"/>
    </style:style>
    <style:style style:name="P96" style:family="paragraph" style:parent-style-name="Text_20_body">
      <style:paragraph-properties fo:margin-left="0cm" fo:line-height="150%" fo:text-align="justify" style:justify-single-word="false" fo:text-indent="0cm" style:auto-text-indent="false"/>
      <style:text-properties style:font-name="Times New Roman" fo:font-size="12pt" officeooo:rsid="00176b39" officeooo:paragraph-rsid="00176b39" style:font-size-asian="12pt" style:font-size-complex="12pt"/>
    </style:style>
    <style:style style:name="P97" style:family="paragraph" style:parent-style-name="Text_20_body" style:list-style-name="L23">
      <style:paragraph-properties fo:line-height="150%"/>
      <style:text-properties style:font-name="Times New Roman" officeooo:rsid="00176b39" style:font-size-complex="12pt"/>
    </style:style>
    <style:style style:name="T1" style:family="text">
      <style:text-properties officeooo:rsid="000cb001"/>
    </style:style>
    <style:style style:name="T2" style:family="text">
      <style:text-properties fo:font-weight="bold" style:font-weight-asian="bold" style:font-name-complex="Arial"/>
    </style:style>
    <style:style style:name="T3" style:family="text">
      <style:text-properties fo:font-weight="bold" officeooo:rsid="000cb001" style:font-weight-asian="bold" style:font-name-complex="Arial"/>
    </style:style>
    <style:style style:name="T4" style:family="text">
      <style:text-properties style:font-name="Times New Roman" fo:font-size="12pt" style:font-size-asian="12pt"/>
    </style:style>
    <style:style style:name="T5" style:family="text">
      <style:text-properties style:font-name="Times New Roman" fo:font-size="12pt" officeooo:rsid="000cb001" style:font-size-asian="12pt"/>
    </style:style>
    <style:style style:name="T6" style:family="text">
      <style:text-properties style:font-name-complex="Arial"/>
    </style:style>
    <style:style style:name="T7" style:family="text">
      <style:text-properties officeooo:rsid="000cb001" style:font-name-complex="Arial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officeooo:rsid="000d4d1c"/>
    </style:style>
    <style:style style:name="T10" style:family="text">
      <style:text-properties fo:color="#ff0000" loext:opacity="100%" fo:font-weight="bold" style:font-weight-asian="bold" style:font-name-complex="Arial"/>
    </style:style>
    <style:style style:name="T11" style:family="text">
      <style:text-properties officeooo:rsid="000ef14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937f4"/>
    </style:style>
    <style:style style:name="T14" style:family="text">
      <style:text-properties officeooo:rsid="00101a7f"/>
    </style:style>
    <style:style style:name="T15" style:family="text">
      <style:text-properties officeooo:rsid="001046b2"/>
    </style:style>
    <style:style style:name="T16" style:family="text">
      <style:text-properties officeooo:rsid="001924d8"/>
    </style:style>
    <style:style style:name="T17" style:family="text">
      <style:text-properties officeooo:rsid="001098a3"/>
    </style:style>
    <style:style style:name="T18" style:family="text">
      <style:text-properties style:font-name="Times New Roman" fo:font-weight="bold" style:font-weight-asian="bold" style:font-weight-complex="bold"/>
    </style:style>
    <style:style style:name="T19" style:family="text">
      <style:text-properties officeooo:rsid="00117aac"/>
    </style:style>
    <style:style style:name="T20" style:family="text">
      <style:text-properties style:use-window-font-color="true" loext:opacity="0%" style:font-name-complex="Ari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weight="normal" officeooo:rsid="001924d8" style:font-weight-asian="normal" style:font-weight-complex="normal"/>
    </style:style>
    <style:style style:name="T23" style:family="text">
      <style:text-properties officeooo:rsid="001353e5"/>
    </style:style>
    <style:style style:name="T24" style:family="text">
      <style:text-properties officeooo:rsid="00176b39"/>
    </style:style>
    <style:style style:name="T25" style:family="text">
      <style:text-properties officeooo:rsid="0015015b"/>
    </style:style>
    <style:style style:name="T26" style:family="text">
      <style:text-properties officeooo:rsid="00199763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NTRO UNIVERSITÁRIO FAESA</text:p>
      <text:p text:style-name="P2">UNIDADE <text:span text:style-name="T1">CARIACICA</text:span></text:p>
      <text:p text:style-name="P2">CURSO DE SISTEMAS DE INFORMAÇÃO</text:p>
      <text:p text:style-name="P3"/>
      <text:p text:style-name="P3"/>
      <text:p text:style-name="P3"/>
      <text:p text:style-name="P3"/>
      <text:p text:style-name="P4"><text:span text:style-name="T2">RA</text:span><text:span text:style-name="T3">Í</text:span><text:span text:style-name="T2">SSA </text:span><text:span text:style-name="T3">DE </text:span><text:span text:style-name="T2">AZEVEDO</text:span></text:p>
      <text:p text:style-name="P3"><text:span text:style-name="T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Strong_20_Emphasis"><text:span text:style-name="T4">SISTEMA DE CONTROLE DE GASTOS PESSOAIS COM INTERFACE EM PYTHON </text:span></text:span></text:p>
      <text:p text:style-name="P5"><text:span text:style-name="Strong_20_Emphasis"><text:span text:style-name="T5">UTILIZANDO</text:span></text:span><text:span text:style-name="Strong_20_Emphasis"><text:span text:style-name="T4"> STREAMLIT</text:span></text:span></text:p>
      <text:p text:style-name="P3"><text:span text:style-name="T2"/></text:p>
      <text:p text:style-name="P3"/>
      <text:p text:style-name="P6"/>
      <text:p text:style-name="P6"/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CARIACICA</text:p>
      <text:p text:style-name="P2">202<text:span text:style-name="T1">5</text:span></text:p>
      <text:h text:style-name="P9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p text:style-name="P4"><text:span text:style-name="T2">RA</text:span><text:span text:style-name="T3">Í</text:span><text:span text:style-name="T2">SSA </text:span><text:span text:style-name="T3">DE </text:span><text:span text:style-name="T2">AZEVEDO</text:span></text:p>
      <text:p text:style-name="P3"><text:span text:style-name="T2"/></text:p>
      <text:p text:style-name="P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<text:span text:style-name="Strong_20_Emphasis"><text:span text:style-name="T4">SISTEMA DE CONTROLE DE GASTOS PESSOAIS COM INTERFACE EM PYTHON </text:span></text:span></text:p>
      <text:p text:style-name="P5"><text:span text:style-name="Strong_20_Emphasis"><text:span text:style-name="T5">UTILIZANDO</text:span></text:span><text:span text:style-name="Strong_20_Emphasis"><text:span text:style-name="T4"> STREAMLIT</text:span></text:span></text:p>
      <text:p text:style-name="P3"/>
      <text:p text:style-name="P3"/>
      <text:p text:style-name="P3"/>
      <text:p text:style-name="P3"/>
      <text:p text:style-name="P11"/>
      <text:p text:style-name="P12"><text:span text:style-name="T6">Trabalho apresentado para a Disciplina </text:span><text:span text:style-name="T7">Projeto Integrador VI-A</text:span><text:span text:style-name="T6">, pelo Curso Sistemas de Informação do </text:span><text:span text:style-name="T7">Centro Universitário Faesa (Cariacica)</text:span>, ministrada pela</text:p>
      <text:p text:style-name="P13">Prof.ª <text:span text:style-name="T8">Lorena Piza Arndt do Nascimento</text:span></text:p>
      <text:p text:style-name="P1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CARIACICA</text:p>
      <text:p text:style-name="P4">202<text:span text:style-name="T9">5</text:span></text:p>
      <text:p text:style-name="P16">SUMÁRIO</text:p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"><text:a xlink:type="simple" xlink:href="#__RefHeading___Toc138151032" text:style-name="Index_20_Link" text:visited-style-name="Index_20_Link">1 INTRODUÇÃO<text:tab/>3</text:a></text:p>
          <text:p text:style-name="P17"><text:a xlink:type="simple" xlink:href="#__RefHeading___Toc138151033" text:style-name="Index_20_Link" text:visited-style-name="Index_20_Link">2 BENEFICIADOS<text:tab/>4</text:a></text:p>
          <text:p text:style-name="P17"><text:a xlink:type="simple" xlink:href="#__RefHeading___Toc138151034" text:style-name="Index_20_Link" text:visited-style-name="Index_20_Link">3 OBJETIVO<text:tab/>5</text:a></text:p>
          <text:p text:style-name="P17"><text:a xlink:type="simple" xlink:href="#__RefHeading___Toc138151035" text:style-name="Index_20_Link" text:visited-style-name="Index_20_Link">4 JUSTFICATIVA<text:tab/>6</text:a></text:p>
          <text:p text:style-name="P17"><text:a xlink:type="simple" xlink:href="#__RefHeading___Toc138151035%20Copia%201" text:style-name="Index_20_Link" text:visited-style-name="Index_20_Link">5 REQUISITOS<text:tab/>7</text:a></text:p>
          <text:p text:style-name="P18"><text:a xlink:type="simple" xlink:href="#__RefHeading___Toc642_3685376074" text:style-name="Index_20_Link" text:visited-style-name="Index_20_Link">Requisitos Funcionais (RF)<text:tab/>7</text:a></text:p>
          <text:p text:style-name="P18"><text:a xlink:type="simple" xlink:href="#__RefHeading___Toc644_3685376074" text:style-name="Index_20_Link" text:visited-style-name="Index_20_Link">Requisitos Não Funcionais (RNF)<text:tab/>7</text:a></text:p>
          <text:p text:style-name="P17"><text:a xlink:type="simple" xlink:href="#__RefHeading___Toc138151035%20Copia%201%20Copia%201" text:style-name="Index_20_Link" text:visited-style-name="Index_20_Link">6 FLUXO DO USUÁRIO<text:tab/>9</text:a></text:p>
          <text:p text:style-name="P17"><text:a xlink:type="simple" xlink:href="#__RefHeading___Toc138151035%20Copia%201%20Copia%201%20Copia%201" text:style-name="Index_20_Link" text:visited-style-name="Index_20_Link">7 o código<text:tab/>10</text:a></text:p>
          <text:p text:style-name="P18"><text:a xlink:type="simple" xlink:href="#__RefHeading___Toc933_3685376074" text:style-name="Index_20_Link" text:visited-style-name="Index_20_Link">1. Importação de Bibliotecas<text:tab/>10</text:a></text:p>
          <text:p text:style-name="P18"><text:a xlink:type="simple" xlink:href="#__RefHeading___Toc935_3685376074" text:style-name="Index_20_Link" text:visited-style-name="Index_20_Link">2. Configuração Inicial<text:tab/>10</text:a></text:p>
          <text:p text:style-name="P18"><text:a xlink:type="simple" xlink:href="#__RefHeading___Toc937_3685376074" text:style-name="Index_20_Link" text:visited-style-name="Index_20_Link">3. Função gerar_pdf(...)<text:tab/>10</text:a></text:p>
          <text:p text:style-name="P18"><text:a xlink:type="simple" xlink:href="#__RefHeading___Toc1092_3685376074" text:style-name="Index_20_Link" text:visited-style-name="Index_20_Link">4. Interface do Usuário<text:tab/>12</text:a></text:p>
          <text:p text:style-name="P18"><text:a xlink:type="simple" xlink:href="#__RefHeading___Toc1094_3685376074" text:style-name="Index_20_Link" text:visited-style-name="Index_20_Link">5. Cálculos Financeiros<text:tab/>13</text:a></text:p>
          <text:p text:style-name="P18"><text:a xlink:type="simple" xlink:href="#__RefHeading___Toc1096_3685376074" text:style-name="Index_20_Link" text:visited-style-name="Index_20_Link">6. Exibição dos Resultados na Interface<text:tab/>14</text:a></text:p>
          <text:p text:style-name="P18"><text:a xlink:type="simple" xlink:href="#__RefHeading___Toc1098_3685376074" text:style-name="Index_20_Link" text:visited-style-name="Index_20_Link">7. Geração do PDF<text:tab/>14</text:a></text:p>
          <text:p text:style-name="P17"><text:a xlink:type="simple" xlink:href="#__RefHeading___Toc138151032%20Copia%201" text:style-name="Index_20_Link" text:visited-style-name="Index_20_Link">8 execução de script<text:tab/>15</text:a></text:p>
          <text:p text:style-name="P17"><text:a xlink:type="simple" xlink:href="#__RefHeading___Toc138151032%20Copia%201%20Copia%201" text:style-name="Index_20_Link" text:visited-style-name="Index_20_Link">9 execução<text:tab/>16</text:a></text:p>
          <text:p text:style-name="P17"><text:a xlink:type="simple" xlink:href="#__RefHeading___Toc1230_1958330918" text:style-name="Index_20_Link" text:visited-style-name="Index_20_Link">10 CONSIDERAÇÕES FINAIS<text:tab/>19</text:a></text:p>
        </text:index-body>
      </text:table-of-content>
      <text:p text:style-name="P19"/>
      <text:p text:style-name="P20"/>
      <text:p text:style-name="P21"><text:span text:style-name="T10"/></text:p>
      <text:p text:style-name="P22"/>
      <text:p text:style-name="P22"/>
      <text:p text:style-name="P22"/>
      <text:p text:style-name="P22"/>
      <text:h text:style-name="P23" text:outline-level="1"><text:bookmark-start text:name="__RefHeading___Toc138151032"/>1 INTRODUÇÃO<text:bookmark-end text:name="__RefHeading___Toc138151032"/></text:h>
      <text:p text:style-name="P24">Muitas pessoas têm dificuldade em controlar suas finanças pessoais. Gastos pequenos do dia a dia, como lanches, transporte e lazer, acabam não sendo registrados, o que gera uma sensação de falta de controle e, muitas vezes, endividamento. </text:p>
      <text:p text:style-name="P25"><text:line-break/>Sem um acompanhamento organizado, fica difícil saber quanto se pode gastar, quanto já foi gasto em cada categoria e quanto ainda sobra no orçamento mensal. </text:p>
      <text:p text:style-name="P25"/>
      <text:p text:style-name="P25">O gerenciamento de finanças pessoais é uma dificuldade comum para muitas pessoas. Pequenas despesas do dia a dia, como transporte, alimentação ou lazer, frequentemente deixam de ser registradas, o que compromete a clareza sobre os gastos ao final do mês. Essa falta de organização gera incertezas quanto ao orçamento disponível, dificulta o planejamento de despesas futuras e pode contribuir para situações de endividamento.</text:p>
      <text:p text:style-name="P26"/>
      <text:p text:style-name="P26">Além disso, a prática de registrar manualmente os gastos em cadernos ou planilhas pode ser trabalhosa e pouco prática, levando ao abandono do hábito de acompanhamento financeiro. A ausência de ferramentas simples e acessíveis acaba se tornando uma barreira para o controle efetivo das finanças pessoais.</text:p>
      <text:p text:style-name="P27">Este projeto é uma aplicação web interativa desenvolvida com <text:span text:style-name="Strong_20_Emphasis">Streamlit</text:span>, que permite ao usuário inserir informações sobre seu <text:span text:style-name="Strong_20_Emphasis">salário</text:span>, <text:span text:style-name="Strong_20_Emphasis">investimentos</text:span> e <text:span text:style-name="Strong_20_Emphasis">despesas mensais</text:span>, gerando um <text:span text:style-name="Strong_20_Emphasis">relatório financeiro personalizado</text:span> em <text:span text:style-name="Strong_20_Emphasis">PDF</text:span> com gráficos de barras e pizza. </text:p>
      <text:p text:style-name="P27">A aplicação visa fornecer uma visão clara da situação financeira mensal do usuário. </text:p>
      <text:p text:style-name="P28"/>
      <text:p text:style-name="P28"/>
      <text:h text:style-name="P29" text:outline-level="1"><text:bookmark-start text:name="__RefHeading___Toc138151033"/>2 <text:span text:style-name="T11">BENEFICIADOS</text:span><text:bookmark-end text:name="__RefHeading___Toc138151033"/></text:h>
      <text:p text:style-name="P30">O sistema proposto poderá beneficiar:</text:p>
      <text:list text:style-name="L1">
        <text:list-item>
          <text:p text:style-name="P31"><text:span text:style-name="Strong_20_Emphasis">Estudantes</text:span> que precisam administrar uma renda limitada, muitas vezes proveniente de bolsas ou mesadas;</text:p>
        </text:list-item>
        <text:list-item>
          <text:p text:style-name="P31"><text:span text:style-name="Strong_20_Emphasis">Famílias</text:span> que buscam maior clareza sobre seus gastos mensais e desejam organizar melhor o orçamento doméstico;</text:p>
        </text:list-item>
        <text:list-item>
          <text:p text:style-name="P31"><text:span text:style-name="Strong_20_Emphasis">Profissionais autônomos ou assalariados</text:span> que desejam acompanhar despesas cotidianas e planejar o uso da renda;</text:p>
        </text:list-item>
        <text:list-item>
          <text:p text:style-name="P31"><text:span text:style-name="T12">Qualquer pessoa</text:span> que tenha como objetivo manter um controle financeiro mais eficiente e intuitivo.</text:p>
        </text:list-item>
      </text:list>
      <text:p text:style-name="P32"><text:span text:style-name="T6"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34" text:outline-level="1"><text:bookmark-start text:name="__RefHeading___Toc138151034"/><text:soft-page-break/>3 <text:span text:style-name="T11">OBJETIVO</text:span><text:bookmark-end text:name="__RefHeading___Toc138151034"/></text:h>
      <text:p text:style-name="P35">O objetivo do projeto é desenvolver um sistema simples e intuitivo de <text:span text:style-name="Strong_20_Emphasis">controle de gastos pessoais</text:span>, utilizando <text:span text:style-name="Strong_20_Emphasis">Python</text:span> em conjunto com o <text:span text:style-name="Strong_20_Emphasis">framework Streamlit</text:span> para a criação de uma interface interativa e amigável.</text:p>
      <text:p text:style-name="P36">O sistema permitirá ao usuário:</text:p>
      <text:list text:style-name="L2">
        <text:list-item>
          <text:p text:style-name="P37"><text:span text:style-name="Strong_20_Emphasis">Registrar despesas</text:span> com valor, categoria (ex.: alimentação, transporte, lazer, contas fixas) e descrição;</text:p>
        </text:list-item>
        <text:list-item>
          <text:p text:style-name="P37"><text:span text:style-name="Strong_20_Emphasis">Consultar o total de despesas</text:span> em um período de tempo determinado;</text:p>
        </text:list-item>
        <text:list-item>
          <text:p text:style-name="P37"><text:span text:style-name="Strong_20_Emphasis">Visualizar </text:span><text:span text:style-name="Strong_20_Emphasis"><text:span text:style-name="T13">gráficos </text:span></text:span>organizados por categoria de gasto;</text:p>
        </text:list-item>
        <text:list-item>
          <text:p text:style-name="P37"><text:span text:style-name="Strong_20_Emphasis">Gerar gráficos automáticos</text:span>, possibilitando a análise visual e rápida da distribuição dos gastos.</text:p>
        </text:list-item>
      </text:list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P34" text:outline-level="1"><text:bookmark-start text:name="__RefHeading___Toc138151035"/><text:soft-page-break/>4 <text:span text:style-name="T11">JUSTFICATIVA</text:span><text:bookmark-end text:name="__RefHeading___Toc138151035"/></text:h>
      <text:p text:style-name="P39">A automatização desse processo traz diversos benefícios:</text:p>
      <text:list text:style-name="L3">
        <text:list-item>
          <text:p text:style-name="P40"><text:span text:style-name="Strong_20_Emphasis">Agilidade</text:span>: os registros podem ser feitos rapidamente, sem necessidade de cálculos manuais;</text:p>
        </text:list-item>
        <text:list-item>
          <text:p text:style-name="P40"><text:span text:style-name="Strong_20_Emphasis">Organização</text:span>: todos os dados ficam centralizados em um único sistema, evitando dispersão em anotações e planilhas soltas;</text:p>
        </text:list-item>
        <text:list-item>
          <text:p text:style-name="P40"><text:span text:style-name="Strong_20_Emphasis">Clareza</text:span>: gráficos e relatórios automáticos permitem visualizar padrões de gastos, identificar excessos e oportunidades de economia;</text:p>
        </text:list-item>
        <text:list-item>
          <text:p text:style-name="P40"><text:span text:style-name="Strong_20_Emphasis">Acessibilidade</text:span>: a utilização do Streamlit garante uma interface de fácil uso, mesmo para pessoas com pouca experiência em tecnologia.</text:p>
        </text:list-item>
      </text:list>
      <text:p text:style-name="P41">Dessa forma, o sistema contribui para promover o <text:span text:style-name="Strong_20_Emphasis">planejamento financeiro pessoal</text:span>, auxiliando usuários a tomarem decisões mais conscientes sobre sua vida financeira e evitando problemas futuros relacionados ao descontrole de despesas.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P43" text:outline-level="1"><text:bookmark-start text:name="__RefHeading___Toc138151035 Copia 1"/><text:soft-page-break/><text:span text:style-name="T14">5</text:span> <text:span text:style-name="T14">REQUISITOS</text:span><text:bookmark-end text:name="__RefHeading___Toc138151035 Copia 1"/></text:h>
      <text:h text:style-name="P44" text:outline-level="3"><text:bookmark-start text:name="__RefHeading___Toc642_3685376074"/>Requisitos Funcionais (RF)<text:bookmark-end text:name="__RefHeading___Toc642_3685376074"/></text:h>
      <text:p text:style-name="P45">O sistema deve:</text:p>
      <text:list text:style-name="L4">
        <text:list-item>
          <text:p text:style-name="P46"><text:span text:style-name="Strong_20_Emphasis">Cadastrar salário mensal</text:span>: na primeira utilização, o usuário informa o valor do seu salário líquido mensal. Esse valor será base para cálculos de limite de gastos e investimentos.</text:p>
        </text:list-item>
        <text:list-item>
          <text:p text:style-name="P46"><text:span text:style-name="Strong_20_Emphasis">Cadastrar despesa</text:span>: permitir que o usuário registre um gasto informando:</text:p>
          <text:list>
            <text:list-item>
              <text:p text:style-name="P46">Valor (numérico)</text:p>
            </text:list-item>
            <text:list-item>
              <text:p text:style-name="P46">Categoria (ex.: Alimentação, Transporte, Lazer, Contas Fixas, Outros)</text:p>
            </text:list-item>
          </text:list>
        </text:list-item>
        <text:list-item>
          <text:p text:style-name="P46"><text:span text:style-name="Strong_20_Emphasis">Listar despesas</text:span>: exibir todas as despesas cadastradas em uma tabela, organizada por data.</text:p>
        </text:list-item>
        <text:list-item>
          <text:p text:style-name="P46"><text:span text:style-name="Strong_20_Emphasis">Calcular totais</text:span>:</text:p>
          <text:list>
            <text:list-item>
              <text:p text:style-name="P46">Total de despesas do mês;</text:p>
            </text:list-item>
            <text:list-item>
              <text:p text:style-name="P46">Saldo restante do salário (salário - total de despesas - investimento).</text:p>
            </text:list-item>
          </text:list>
        </text:list-item>
        <text:list-item>
          <text:p text:style-name="P46"><text:span text:style-name="Strong_20_Emphasis">Gerar relatórios</text:span>: apresentar o total de despesas por categoria, em formato de tabela e gráfico.</text:p>
        </text:list-item>
        <text:list-item>
          <text:p text:style-name="P46"><text:span text:style-name="Strong_20_Emphasis">Visualizar gráficos interativos</text:span>: exibir gráficos (pizza e barras) que mostrem a distribuição dos gastos por categoria ou por período.</text:p>
        </text:list-item>
        <text:list-item>
          <text:p text:style-name="P46"><text:span text:style-name="Strong_20_Emphasis">Simulação de investimento</text:span>: permitir que o usuário escolha investir entre <text:span text:style-name="Strong_20_Emphasis">10% e 30% do salário</text:span> mensal em uma aplicação fictícia (simulação de poupança).</text:p>
          <text:list>
            <text:list-item>
              <text:p text:style-name="P46">O sistema calcula automaticamente quanto será investido.</text:p>
            </text:list-item>
          </text:list>
        </text:list-item>
        <text:list-item>
          <text:p text:style-name="P46"><text:span text:style-name="Strong_20_Emphasis">Exportar dados (opcional)</text:span>: permitir que o usuário baixe os dados em formato <text:span text:style-name="T13">PDF</text:span>.</text:p>
        </text:list-item>
      </text:list>
      <text:h text:style-name="P47" text:outline-level="3" text:is-list-header="true"><text:bookmark-start text:name="__RefHeading___Toc644_3685376074"/>Requisitos Não Funcionais (RNF)<text:bookmark-end text:name="__RefHeading___Toc644_3685376074"/></text:h>
      <text:list text:style-name="L5">
        <text:list-item>
          <text:p text:style-name="P48"><text:span text:style-name="Strong_20_Emphasis">Interface amigável</text:span> em Streamlit:</text:p>
          <text:list>
            <text:list-item>
              <text:p text:style-name="P48">Cadastro de salário</text:p>
            </text:list-item>
            <text:list-item>
              <text:p text:style-name="P48">Registro de despesas</text:p>
            </text:list-item>
            <text:list-item>
              <text:p text:style-name="P48">Relatórios e gráficos</text:p>
            </text:list-item>
            <text:list-item>
              <text:p text:style-name="P48">Simulação de investimentos</text:p>
            </text:list-item>
          </text:list>
        </text:list-item>
        <text:list-item>
          <text:p text:style-name="P48"><text:span text:style-name="Strong_20_Emphasis">Persistência dos dados</text:span>: os dados de salário, despesas e investimentos serão armazenados em um arquivo <text:span text:style-name="T13">PDF</text:span>.</text:p>
        </text:list-item>
        <text:list-item>
          <text:p text:style-name="P48"><text:soft-page-break/><text:span text:style-name="Strong_20_Emphasis">Validação de entrada</text:span>:</text:p>
          <text:list>
            <text:list-item>
              <text:p text:style-name="P48">Salário deve ser um número positivo;</text:p>
            </text:list-item>
            <text:list-item>
              <text:p text:style-name="P48">Valor da despesa deve ser numérico e maior que zero;</text:p>
            </text:list-item>
            <text:list-item>
              <text:p text:style-name="P48">Percentual de investimento deve estar entre 0% e <text:span text:style-name="T13">10</text:span>0%.</text:p>
            </text:list-item>
          </text:list>
        </text:list-item>
        <text:list-item>
          <text:p text:style-name="P48"><text:span text:style-name="Strong_20_Emphasis">Portabilidade</text:span>: rodar em qualquer computador com Python instalado.</text:p>
          <text:p text:style-name="P49"/>
        </text:list-item>
      </text:list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h text:style-name="P51" text:outline-level="1"><text:bookmark-start text:name="__RefHeading___Toc138151035 Copia 1 Copia 1"/><text:soft-page-break/><text:span text:style-name="T15">6</text:span> <text:span text:style-name="T15">FLUXO DO USUÁRIO</text:span><text:bookmark-end text:name="__RefHeading___Toc138151035 Copia 1 Copia 1"/></text:h>
      <text:p text:style-name="P52">Ao abrir o sistema, o usuário <text:span text:style-name="Strong_20_Emphasis">informa seu salário mensal</text:span>.</text:p>
      <text:list text:style-name="L6">
        <text:list-item>
          <text:p text:style-name="P53">Escolhe um <text:span text:style-name="Strong_20_Emphasis">percentual de investimento</text:span> (entre 0% e <text:span text:style-name="T13">10</text:span>0% do salário).</text:p>
        </text:list-item>
      </text:list>
      <text:list text:style-name="L7">
        <text:list-item>
          <text:p text:style-name="P54">O sistema calcula automaticamente quanto será destinado ao investimento todo mês.</text:p>
        </text:list-item>
      </text:list>
      <text:list text:style-name="L8">
        <text:list-item>
          <text:p text:style-name="P55">O usuário registra suas despesas normalmente.</text:p>
        </text:list-item>
      </text:list>
      <text:list text:style-name="L9">
        <text:list-item>
          <text:p text:style-name="P56">O sistema mostra:</text:p>
        </text:list-item>
      </text:list>
      <text:list text:style-name="L10">
        <text:list-item>
          <text:p text:style-name="P57">Total gasto</text:p>
        </text:list-item>
        <text:list-item>
          <text:p text:style-name="P57">Total investido</text:p>
        </text:list-item>
        <text:list-item>
          <text:p text:style-name="P57">Saldo restante do mês</text:p>
        </text:list-item>
      </text:list>
      <text:list text:style-name="L11">
        <text:list-item>
          <text:p text:style-name="P58">Em <text:span text:style-name="Strong_20_Emphasis">Relatórios</text:span>, o usuário pode:</text:p>
        </text:list-item>
      </text:list>
      <text:list text:style-name="L12">
        <text:list-item>
          <text:p text:style-name="P59">Ver gráficos de gastos por categoria</text:p>
        </text:list-item>
        <text:list-item>
          <text:p text:style-name="P59">Ver gráfico da evolução do investimento ao longo dos meses</text:p>
        </text:list-item>
      </text:list>
      <text:p text:style-name="P60"/>
      <text:p text:style-name="P61"><draw:frame draw:style-name="fr1" draw:name="Figura1" text:anchor-type="as-char" svg:y="-10.823cm" svg:width="9.841cm" svg:height="12.919cm" draw:z-index="0"><draw:image xlink:href="Pictures/10000001000003B5000006267550DFCD.png" xlink:type="simple" xlink:show="embed" xlink:actuate="onLoad" draw:mime-type="image/png"/></draw:frame><text:s/></text:p>
      <text:h text:style-name="P62" text:outline-level="1"><text:bookmark-start text:name="__RefHeading___Toc138151035 Copia 1 Copia 1 Copia 1"/><text:soft-page-break/><text:span text:style-name="T16">7</text:span> <text:span text:style-name="T17">o código</text:span><text:bookmark-end text:name="__RefHeading___Toc138151035 Copia 1 Copia 1 Copia 1"/></text:h>
      <text:h text:style-name="P63" text:outline-level="3"><text:bookmark-start text:name="__RefHeading___Toc933_3685376074"/>1. <text:span text:style-name="Strong_20_Emphasis">Importação de Bibliotecas</text:span><text:bookmark-end text:name="__RefHeading___Toc933_3685376074"/></text:h>
      <text:p text:style-name="P64">O código utiliza as seguintes bibliotecas:</text:p>
      <text:list text:style-name="L13">
        <text:list-item>
          <text:p text:style-name="P65"><text:span text:style-name="Source_20_Text"><text:span text:style-name="T18">streamlit</text:span></text:span><text:span text:style-name="T12">:</text:span> Interface web interativa.</text:p>
        </text:list-item>
        <text:list-item>
          <text:p text:style-name="P65"><text:span text:style-name="Source_20_Text"><text:span text:style-name="T18">pandas</text:span></text:span><text:span text:style-name="T12">: </text:span>Manipulação de dados tabulares.</text:p>
        </text:list-item>
        <text:list-item>
          <text:p text:style-name="P65"><text:span text:style-name="Source_20_Text"><text:span text:style-name="T18">matplotlib.pyplot</text:span></text:span><text:span text:style-name="T12">:</text:span> Geração de gráficos.</text:p>
        </text:list-item>
        <text:list-item>
          <text:p text:style-name="P65"><text:span text:style-name="Source_20_Text"><text:span text:style-name="T18">reportlab</text:span></text:span><text:span text:style-name="T12">: </text:span>Geração de arquivos PDF.</text:p>
        </text:list-item>
        <text:list-item>
          <text:p text:style-name="P65"><text:span text:style-name="Source_20_Text"><text:span text:style-name="T18">datetime</text:span></text:span><text:span text:style-name="T12">:</text:span> Obtenção da data atual.</text:p>
        </text:list-item>
        <text:list-item>
          <text:p text:style-name="P65"><text:span text:style-name="Source_20_Text"><text:span text:style-name="T18">io.BytesIO</text:span></text:span><text:span text:style-name="T12">:</text:span> Manipulação de arquivos em memória.</text:p>
        </text:list-item>
      </text:list>
      <text:p text:style-name="P66"/>
      <text:p text:style-name="P67"><draw:frame draw:style-name="fr2" draw:name="Figura2" text:anchor-type="char" svg:width="16cm" svg:height="3.505cm" draw:z-index="1"><draw:image xlink:href="Pictures/1000000100000415000000E5B0CFB6E7.png" xlink:type="simple" xlink:show="embed" xlink:actuate="onLoad" draw:mime-type="image/png"/></draw:frame><text:s/></text:p>
      <text:h text:style-name="P68" text:outline-level="3"><text:bookmark-start text:name="__RefHeading___Toc935_3685376074"/>2. <text:span text:style-name="Strong_20_Emphasis">Configuração Inicial</text:span><text:bookmark-end text:name="__RefHeading___Toc935_3685376074"/></text:h>
      <text:p text:style-name="P69"><draw:frame draw:style-name="fr2" draw:name="Figura3" text:anchor-type="char" svg:width="16cm" svg:height="1.192cm" draw:z-index="2"><draw:image xlink:href="Pictures/10000001000002EF0000003831DE1673.png" xlink:type="simple" xlink:show="embed" xlink:actuate="onLoad" draw:mime-type="image/png"/></draw:frame>Define o título e o layout da aplicação no navegador. </text:p>
      <text:p text:style-name="P69"/>
      <text:h text:style-name="P70" text:outline-level="3"><text:bookmark-start text:name="__RefHeading___Toc937_3685376074"/>3. <text:span text:style-name="Strong_20_Emphasis">Função </text:span><text:span text:style-name="Strong_20_Emphasis"><text:span text:style-name="Source_20_Text">gerar_pdf(...)</text:span></text:span><text:bookmark-end text:name="__RefHeading___Toc937_3685376074"/></text:h>
      <text:p text:style-name="P64">Essa função é responsável por gerar o <text:span text:style-name="Strong_20_Emphasis">relatório financeiro em PDF</text:span> com os seguintes elementos:</text:p>
      <text:list text:style-name="L14">
        <text:list-item>
          <text:p text:style-name="P71">Título e saudação personalizada.</text:p>
        </text:list-item>
        <text:list-item>
          <text:p text:style-name="P71">Resumo financeiro (salário, investimento, despesas e saldo).</text:p>
        </text:list-item>
        <text:list-item>
          <text:p text:style-name="P71"><text:span text:style-name="T19">T</text:span>abela com as despesas por categoria.</text:p>
        </text:list-item>
        <text:list-item>
          <text:p text:style-name="P71">Gráfico de barras com valores por categoria.</text:p>
        </text:list-item>
        <text:list-item>
          <text:p text:style-name="P71">Gráfico de pizza com distribuição percentual das despesas.</text:p>
        </text:list-item>
      </text:list>
      <text:p text:style-name="P72"><draw:frame draw:style-name="fr3" draw:name="Figura4" text:anchor-type="char" svg:width="15.004cm" svg:height="23.867cm" draw:z-index="3"><draw:image xlink:href="Pictures/1000000100000237000003861B877970.png" xlink:type="simple" xlink:show="embed" xlink:actuate="onLoad" draw:mime-type="image/png"/></draw:frame><text:soft-page-break/></text:p>
      <text:p text:style-name="P72"><text:soft-page-break/>Os gráficos são gerados com <text:span text:style-name="Source_20_Text">matplotlib</text:span> e inseridos no PDF com a biblioteca <text:span text:style-name="Source_20_Text">reportlab</text:span>.</text:p>
      <text:p text:style-name="P69"/>
      <text:h text:style-name="P68" text:outline-level="3"><text:bookmark-start text:name="__RefHeading___Toc1092_3685376074"/>4. <text:span text:style-name="Strong_20_Emphasis">Interface do Usuário</text:span><text:bookmark-end text:name="__RefHeading___Toc1092_3685376074"/></text:h>
      <text:p text:style-name="P73">A aplicação interage com o usuário da seguinte forma:</text:p>
      <text:h text:style-name="P74" text:outline-level="4"><text:span text:style-name="T20">a. </text:span><text:span text:style-name="Strong_20_Emphasis"><text:span text:style-name="T20">Coleta de dados básicos</text:span></text:span></text:h>
      <text:list text:style-name="L15">
        <text:list-item>
          <text:list>
            <text:list-item>
              <text:list>
                <text:list-item>
                  <text:list>
                    <text:list-item>
                      <text:h text:style-name="P75" text:outline-level="4"><text:span text:style-name="T21">Nome do usuário (</text:span><text:span text:style-name="Source_20_Text"><text:span text:style-name="T21">st.text_input</text:span></text:span><text:span text:style-name="T21">)</text:span></text:h>
                    </text:list-item>
                    <text:list-item>
                      <text:h text:style-name="P75" text:outline-level="4"><text:span text:style-name="T21">Salário mensal (</text:span><text:span text:style-name="Source_20_Text"><text:span text:style-name="T21">st.number_input</text:span></text:span><text:span text:style-name="T21">)</text:span></text:h>
                    </text:list-item>
                  </text:list>
                </text:list-item>
              </text:list>
            </text:list-item>
          </text:list>
        </text:list-item>
      </text:list>
      <text:h text:style-name="P76" text:outline-level="4" text:is-list-header="true">b. <text:span text:style-name="Strong_20_Emphasis">Investimentos</text:span></text:h>
      <text:p text:style-name="P73">Se o usuário optar por investir uma porcentagem do salário, ele seleciona essa porcentagem com um <text:span text:style-name="Source_20_Text">st.slider</text:span>, e o valor investido é calculado automaticamente.</text:p>
      <text:h text:style-name="P76" text:outline-level="4">c. <text:span text:style-name="Strong_20_Emphasis">Despesas</text:span></text:h>
      <text:p text:style-name="P77">São solicitadas as despesas mensais em cinco categorias fixas:</text:p>
      <text:list text:style-name="L16">
        <text:list-item>
          <text:p text:style-name="P78">Aluguel</text:p>
        </text:list-item>
        <text:list-item>
          <text:p text:style-name="P78">Alimentação</text:p>
        </text:list-item>
        <text:list-item>
          <text:p text:style-name="P78">Transporte</text:p>
        </text:list-item>
        <text:list-item>
          <text:p text:style-name="P78">Lazer</text:p>
        </text:list-item>
        <text:list-item>
          <text:p text:style-name="P78">Outros</text:p>
        </text:list-item>
      </text:list>
      <text:p text:style-name="P73">Cada valor é armazenado em um dicionário e convertido em um DataFrame (<text:span text:style-name="Source_20_Text">df_despesas</text:span>).</text:p>
      <text:p text:style-name="P67"/>
      <text:p text:style-name="P67"/>
      <text:p text:style-name="P67"/>
      <text:p text:style-name="P67"><draw:frame draw:style-name="fr4" draw:name="Figura5" text:anchor-type="char" svg:width="16cm" svg:height="17.186cm" draw:z-index="4"><draw:image xlink:href="Pictures/10000001000002CB00000300EA8FEAA9.png" xlink:type="simple" xlink:show="embed" xlink:actuate="onLoad" draw:mime-type="image/png"/></draw:frame><text:soft-page-break/><text:s/></text:p>
      <text:h text:style-name="P79" text:outline-level="3" text:is-list-header="true"><text:bookmark-start text:name="__RefHeading___Toc1094_3685376074"/><text:span text:style-name="T6">5. </text:span><text:span text:style-name="Strong_20_Emphasis"><text:span text:style-name="T6">Cálculos Financeiros</text:span></text:span><text:bookmark-end text:name="__RefHeading___Toc1094_3685376074"/></text:h>
      <text:p text:style-name="P77">Com base nas entradas do usuário, os seguintes valores são calculados:</text:p>
      <text:list text:style-name="L17">
        <text:list-item>
          <text:p text:style-name="P80"><text:span text:style-name="Strong_20_Emphasis">Total de Despesas</text:span></text:p>
        </text:list-item>
        <text:list-item>
          <text:p text:style-name="P80"><text:span text:style-name="Strong_20_Emphasis">Valor investido</text:span> (caso aplicável)</text:p>
        </text:list-item>
        <text:list-item>
          <text:p text:style-name="P80"><text:span text:style-name="Strong_20_Emphasis">Saldo final</text:span> = Salário - Despesas - Investimento</text:p>
        </text:list-item>
      </text:list>
      <text:h text:style-name="P79" text:outline-level="3" text:is-list-header="true"><text:bookmark-start text:name="__RefHeading___Toc1096_3685376074"/><text:soft-page-break/><text:span text:style-name="T6">6. </text:span><text:span text:style-name="Strong_20_Emphasis"><text:span text:style-name="T6">Exibição dos Resultados na Interface</text:span></text:span><text:bookmark-end text:name="__RefHeading___Toc1096_3685376074"/></text:h>
      <text:p text:style-name="P77">O resumo é exibido na tela com:</text:p>
      <text:list text:style-name="L18">
        <text:list-item>
          <text:p text:style-name="P81">Textos formatados</text:p>
        </text:list-item>
        <text:list-item>
          <text:p text:style-name="P81">Gráfico de barras (<text:span text:style-name="Source_20_Text">bar</text:span>)<text:span text:style-name="T19">]</text:span></text:p>
        </text:list-item>
        <text:list-item>
          <text:p text:style-name="P81">Gráfico de pizza (<text:span text:style-name="Source_20_Text">pie</text:span>)</text:p>
        </text:list-item>
      </text:list>
      <text:h text:style-name="P82" text:outline-level="3" text:is-list-header="true"/>
      <text:h text:style-name="P79" text:outline-level="3"><text:bookmark-start text:name="__RefHeading___Toc1098_3685376074"/><text:span text:style-name="T6">7. </text:span><text:span text:style-name="Strong_20_Emphasis"><text:span text:style-name="T6">Geração do PDF</text:span></text:span><text:bookmark-end text:name="__RefHeading___Toc1098_3685376074"/></text:h>
      <text:p text:style-name="P73">Após o preenchimento dos dados, o usuário pode clicar em:</text:p>
      <text:p text:style-name="P73"><draw:frame draw:style-name="fr2" draw:name="Figura6" text:anchor-type="char" svg:width="16cm" svg:height="1.187cm" draw:z-index="5"><draw:image xlink:href="Pictures/10000001000004D70000005C920679DE.png" xlink:type="simple" xlink:show="embed" xlink:actuate="onLoad" draw:mime-type="image/png"/></draw:frame>Isso gera e permite o download de um relatório com todos os dados, incluindo os gráficos.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h text:style-name="P83" text:outline-level="1"><text:bookmark-start text:name="__RefHeading___Toc138151032 Copia 1"/><text:span text:style-name="T22">8</text:span> <text:span text:style-name="T23">execução </text:span><text:span text:style-name="T24">de script</text:span><text:bookmark-end text:name="__RefHeading___Toc138151032 Copia 1"/></text:h>
      <text:p text:style-name="P84">A interface pode ser ativa de 2 formas:</text:p>
      <text:list text:style-name="L19">
        <text:list-item>
          <text:p text:style-name="P85">Via termina<text:span text:style-name="T25">l</text:span></text:p>
          <text:p text:style-name="P85">Através do código de ativação local do stramlit</text:p>
          <text:p text:style-name="P85"/>
          <text:p text:style-name="P86"><text:span text:style-name="ch2_5f_dracula.Name">streamlit</text:span><text:span text:style-name="ch2_5f_dracula.Text"> </text:span><text:span text:style-name="ch2_5f_dracula.Name">run</text:span><text:span text:style-name="ch2_5f_dracula.Text"> </text:span><text:span text:style-name="ch2_5f_dracula.Name">system</text:span><text:span text:style-name="ch2_5f_dracula.Operator">.</text:span><text:span text:style-name="ch2_5f_dracula.Name">py</text:span></text:p>
          <text:p text:style-name="P85"/>
        </text:list-item>
        <text:list-item>
          <text:p text:style-name="P85">Através do link de Deploy do strea<text:span text:style-name="T26">m</text:span>lit</text:p>
          <text:p text:style-name="P87"><text:a xlink:type="simple" xlink:href="https://projetointegrador-finance.streamlit.app/" text:style-name="Internet_20_link" text:visited-style-name="Visited_20_Internet_20_Link">[ CLIQUE AQUI ]</text:a></text:p>
        </text:list-item>
      </text:list>
      <text:p text:style-name="P67"/>
      <text:h text:style-name="P88" text:outline-level="1"><text:bookmark-start text:name="__RefHeading___Toc138151032 Copia 1 Copia 1"/><text:span text:style-name="T16">9</text:span><text:span text:style-name="T24"> </text:span><text:span text:style-name="T23">execução </text:span><text:bookmark-end text:name="__RefHeading___Toc138151032 Copia 1 Copia 1"/></text:h>
      <text:list text:style-name="L20">
        <text:list-item>
          <text:p text:style-name="P89">Informe de Nome e Rendimentos</text:p>
        </text:list-item>
      </text:list>
      <text:p text:style-name="P90"><draw:frame draw:style-name="fr2" draw:name="Figura7" text:anchor-type="char" svg:width="16cm" svg:height="5.911cm" draw:z-index="6"><draw:image xlink:href="Pictures/10000001000005CE000002255779BA73.png" xlink:type="simple" xlink:show="embed" xlink:actuate="onLoad" draw:mime-type="image/png"/></draw:frame><text:s/></text:p>
      <text:list text:style-name="L21">
        <text:list-item>
          <text:p text:style-name="P91">Decisão de investimento de parte do rendimento e % a ser investida </text:p>
        </text:list-item>
      </text:list>
      <text:p text:style-name="P92"><draw:frame draw:style-name="fr5" draw:name="Figura8" text:anchor-type="char" svg:width="15.365cm" svg:height="3.875cm" draw:z-index="7"><draw:image xlink:href="Pictures/10000001000004BD0000013214435F77.png" xlink:type="simple" xlink:show="embed" xlink:actuate="onLoad" draw:mime-type="image/png"/></draw:frame><text:s/></text:p>
      <text:list text:style-name="L22">
        <text:list-item>
          <text:p text:style-name="P93">Informe de despesas</text:p>
          <text:p text:style-name="P93"><draw:frame draw:style-name="fr5" draw:name="Figura9" text:anchor-type="char" svg:width="15.365cm" svg:height="9.102cm" draw:z-index="8"><draw:image xlink:href="Pictures/10000001000004BC000002CEB1AE3E09.png" xlink:type="simple" xlink:show="embed" xlink:actuate="onLoad" draw:mime-type="image/png"/></draw:frame></text:p>
        </text:list-item>
      </text:list>
      <text:p text:style-name="P94"/>
      <text:p text:style-name="P94"/>
      <text:list text:continue-numbering="true" text:style-name="L22">
        <text:list-item>
          <text:p text:style-name="P93"><text:soft-page-break/>Resultado Parcial </text:p>
          <text:p text:style-name="P95"><draw:frame draw:style-name="fr5" draw:name="Figura10" text:anchor-type="char" svg:width="12.326cm" svg:height="5.687cm" draw:z-index="9"><draw:image xlink:href="Pictures/100000010000036500000191B8E28B05.png" xlink:type="simple" xlink:show="embed" xlink:actuate="onLoad" draw:mime-type="image/png"/></draw:frame><text:s/></text:p>
        </text:list-item>
      </text:list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list text:continue-numbering="true" text:style-name="L22">
        <text:list-item>
          <text:p text:style-name="P93">Gráfico de despesas e distribuição % por categoria </text:p>
        </text:list-item>
      </text:list>
      <text:p text:style-name="P94"/>
      <text:list text:continue-numbering="true" text:style-name="L22">
        <text:list-header>
          <text:p text:style-name="P95"><draw:frame draw:style-name="fr3" draw:name="Figura11" text:anchor-type="char" svg:width="9.62cm" svg:height="16.364cm" draw:z-index="10"><draw:image xlink:href="Pictures/100000010000018700000299215A23B8.png" xlink:type="simple" xlink:show="embed" xlink:actuate="onLoad" draw:mime-type="image/png"/></draw:frame><text:s/></text:p>
        </text:list-header>
      </text:list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list text:continue-numbering="true" text:style-name="L22">
        <text:list-item>
          <text:p text:style-name="P93"><text:soft-page-break/>Relatório em PDF</text:p>
        </text:list-item>
      </text:list>
      <text:p text:style-name="P94"><text:s/></text:p>
      <text:p text:style-name="P94"><draw:frame draw:style-name="fr2" draw:name="Figura12" text:anchor-type="char" svg:width="16cm" svg:height="10.34cm" draw:z-index="11"><draw:image xlink:href="Pictures/100000010000035000000224397A8270.png" xlink:type="simple" xlink:show="embed" xlink:actuate="onLoad" draw:mime-type="image/png"/></draw:frame><text:s/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h text:style-name="P88" text:outline-level="1"><text:bookmark-start text:name="__RefHeading___Toc1230_1958330918"/><text:span text:style-name="T16">10</text:span> <text:span text:style-name="T24">CONSIDERAÇÕES FINAIS</text:span><text:bookmark-end text:name="__RefHeading___Toc1230_1958330918"/></text:h>
      <text:p text:style-name="P96">A organização das finanças por categorias permite uma <text:span text:style-name="Strong_20_Emphasis">visão clara dos principais gastos</text:span>, facilitando o entendimento de <text:span text:style-name="Strong_20_Emphasis">onde o dinheiro está sendo alocado</text:span>. Neste relatório, foi possível identificar a distribuição das despesas em categorias como Alimentação, Transporte, Lazer e Educação, o que possibilita reflexões importantes:</text:p>
      <text:list text:style-name="L23">
        <text:list-item>
          <text:p text:style-name="P97"><text:span text:style-name="Strong_20_Emphasis">Identificação de excessos</text:span>: Categorias com gastos muito elevados podem indicar oportunidades de redução ou realocação.</text:p>
        </text:list-item>
        <text:list-item>
          <text:p text:style-name="P97"><text:span text:style-name="Strong_20_Emphasis">Tomada de decisão consciente</text:span>: Visualizar os dados facilita decisões mais estratégicas, como cortar gastos supérfluos ou investir mais em áreas prioritárias.</text:p>
        </text:list-item>
        <text:list-item>
          <text:p text:style-name="P97"><text:span text:style-name="Strong_20_Emphasis">Planejamento financeiro eficaz</text:span>: Compreender o perfil de consumo é o primeiro passo para definir metas financeiras realistas e alcançar estabilidade financeira.</text:p>
        </text:list-item>
        <text:list-item>
          <text:p text:style-name="P97"><text:span text:style-name="Strong_20_Emphasis">Importância da educação financeira</text:span>: Ter domínio sobre seus próprios dados financeiros é essencial para evitar dívidas e construir patrimônio a longo prazo.</text:p>
        </text:list-item>
      </text:list>
      <text:p text:style-name="P9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Negrito" svg:font-family="'Arial Negrito'" style:font-family-generic="swiss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t" fo:country="BR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text-indent="1.251cm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4pt" style:language-complex="ar" style:country-complex="SA"/>
    </style:style>
    <style:style style:name="Heading" style:family="paragraph" style:parent-style-name="Standard" style:next-style-name="Standard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5b9bd5" style:shadow="none"/>
      <style:text-properties fo:color="#323e4f" loext:opacity="100%" style:font-name="Calibri Light" fo:font-family="'Calibri Light'" style:font-family-generic="swiss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next-style-name="Standard" style:class="extra">
      <style:paragraph-properties fo:margin-left="0cm" fo:margin-right="0cm" fo:margin-top="0.423cm" fo:margin-bottom="0cm" style:contextual-spacing="false" fo:text-align="center" style:justify-single-word="false" fo:text-indent="0cm" style:auto-text-indent="false"/>
      <style:text-properties fo:color="#000000" loext:opacity="100%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left="0cm" fo:margin-right="0cm" fo:margin-top="0cm" fo:margin-bottom="0.635cm" style:contextual-spacing="false" fo:text-align="start" style:justify-single-word="false" fo:keep-together="always" fo:text-indent="0cm" style:auto-text-indent="false" fo:keep-with-next="always"/>
      <style:text-properties fo:text-transform="uppercase" style:font-name="Arial Negrito" fo:font-family="'Arial Negrito'" style:font-family-generic="swis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left="0cm" fo:margin-right="0cm" fo:margin-top="0.635cm" fo:margin-bottom="0.635cm" style:contextual-spacing="false" fo:text-align="start" style:justify-single-word="false" fo:keep-together="always" fo:text-indent="0cm" style:auto-text-indent="false" fo:keep-with-next="always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left="0cm" fo:margin-right="0cm" fo:margin-top="0.635cm" fo:margin-bottom="0.635cm" style:contextual-spacing="false" fo:keep-together="always" fo:text-indent="0cm" style:auto-text-indent="false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353cm" fo:margin-bottom="0cm" style:contextual-spacing="false" fo:keep-together="always" fo:keep-with-next="always"/>
      <style:text-properties fo:color="#5b9bd5" loext:opacity="100%" style:font-name="Calibri Light" fo:font-family="'Calibri Light'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top="0.353cm" fo:margin-bottom="0cm" style:contextual-spacing="false" fo:keep-together="always" fo:keep-with-next="always"/>
      <style:text-properties fo:color="#1f4d78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PPGEC_3a__20_linha_20_em_20_branco" style:display-name="PPGEC: linha em branco" style:family="paragraph" style:parent-style-name="Standard">
      <style:paragraph-properties style:text-autospace="ideograph-alpha"/>
      <style:text-properties style:font-size-complex="10pt"/>
    </style:style>
    <style:style style:name="Texto_20_de_20_comentário" style:display-name="Texto de comentário" style:family="paragraph" style:parent-style-name="Standard"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text-indent="0cm" style:auto-text-indent="false"/>
      <style:text-properties fo:text-transform="uppercase" style:font-name="Arial Negrito" fo:font-family="'Arial Negrito'" style:font-family-generic="swiss" fo:font-weight="bold" style:font-weight-asian="bold" style:font-name-complex="Arial Negrito" style:font-family-complex="'Arial Negrito'" style:font-family-generic-complex="swiss"/>
    </style:style>
    <style:style style:name="Contents_20_2" style:display-name="Contents 2" style:family="paragraph" style:parent-style-name="Standard" style:next-style-name="Standard" style:class="index">
      <style:paragraph-properties fo:margin-left="0cm" fo:margin-right="0cm" fo:text-indent="0cm" style:auto-text-indent="false"/>
      <style:text-properties style:font-name="Arial Negrito" fo:font-family="'Arial Negrito'" style:font-family-generic="swiss" fo:font-weight="bold" style:font-weight-asian="bold" style:font-name-complex="Arial Negrito" style:font-family-complex="'Arial Negrito'" style:font-family-generic-complex="swiss"/>
    </style:style>
    <style:style style:name="Fonte_20_das_20_ilustrações" style:display-name="Fonte das ilustrações" style:family="paragraph" style:parent-style-name="Standard" style:next-style-name="Standard">
      <style:paragraph-properties fo:margin-left="0cm" fo:margin-right="0cm" fo:margin-top="0.212cm" fo:margin-bottom="0.635cm" style:contextual-spacing="false" fo:text-align="center" style:justify-single-word="false" fo:text-indent="0cm" style:auto-text-indent="false"/>
      <style:text-properties fo:font-size="11pt" style:font-size-asian="11pt"/>
    </style:style>
    <style:style style:name="Footnote" style:family="paragraph" style:parent-style-name="Standard" style:class="extra">
      <style:paragraph-properties fo:margin-left="0cm" fo:margin-right="0cm" fo:line-height="100%" fo:text-indent="0cm" style:auto-text-indent="false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line-height="100%"/>
    </style:style>
    <style:style style:name="Footer" style:family="paragraph" style:parent-style-name="Standard" style:class="extra">
      <style:paragraph-properties fo:line-height="100%"/>
    </style:style>
    <style:style style:name="Contents_20_3" style:display-name="Contents 3" style:family="paragraph" style:parent-style-name="Standard" style:next-style-name="Standard" style:class="index">
      <style:paragraph-properties fo:margin-left="0cm" fo:margin-right="0cm" fo:text-indent="0cm" style:auto-text-indent="false"/>
    </style:style>
    <style:style style:name="ALINEA" style:family="paragraph" style:parent-style-name="Standard" style:next-style-name="Standard" style:list-style-name="WW8Num8"/>
    <style:style style:name="ALÍNEAS" style:family="paragraph" style:parent-style-name="Standard" style:list-style-name="WW8Num6">
      <style:paragraph-properties style:text-autospace="ideograph-alpha"/>
      <style:text-properties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FONTE_20_DAS_20_ILUSTRAÇÕES" style:display-name="FONTE DAS ILUSTRAÇÕES" style:family="paragraph" style:parent-style-name="Standard" style:next-style-name="Standard">
      <style:paragraph-properties fo:margin-left="0cm" fo:margin-right="0cm" fo:margin-top="0.106cm" fo:margin-bottom="0.423cm" style:contextual-spacing="false" fo:text-align="center" style:justify-single-word="false" fo:text-indent="0cm" style:auto-text-indent="false" style:text-autospace="ideograph-alpha"/>
      <style:text-properties fo:font-size="11pt" style:font-name-asian="Calibri" style:font-family-asian="Calibri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Texto_20_de_20_balão" style:display-name="Texto de balã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ágrafo_20_Texto" style:display-name="Parágrafo Texto" style:family="paragraph" style:parent-style-name="Standard"/>
    <style:style style:name="REFERÊNCIAS" style:family="paragraph">
      <style:paragraph-properties fo:margin-top="0cm" fo:margin-bottom="0.423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4pt" style:language-complex="ar" style:country-complex="SA"/>
    </style:style>
    <style:style style:name="TítuloApend_5f_Anexo" style:display-name="TítuloApend_Anexo" style:family="paragraph" style:parent-style-name="Heading">
      <style:paragraph-properties fo:margin-top="0cm" fo:margin-bottom="0.635cm" style:contextual-spacing="true" fo:line-height="150%" fo:text-align="center" style:justify-single-word="false" fo:padding="0cm" fo:border="none" style:shadow="none"/>
      <style:text-properties fo:color="#000000" loext:opacity="100%" style:font-name="Arial" fo:font-family="Arial" style:font-family-generic="swiss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CITAÇÃO_20_LONGA" style:display-name="CITAÇÃO LONGA" style:family="paragraph" style:parent-style-name="Standard" style:next-style-name="Standard">
      <style:paragraph-properties fo:margin-left="4.001cm" fo:margin-right="0cm" fo:margin-top="0.635cm" fo:margin-bottom="0.635cm" style:contextual-spacing="true" fo:line-height="100%" fo:text-indent="0cm" style:auto-text-indent="false"/>
      <style:text-properties fo:font-size="10pt" style:font-size-asian="10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Índice_20_de_20_ilustrações" style:display-name="Índice de ilustrações" style:family="paragraph" style:parent-style-name="Standard" style:next-style-name="Standard">
      <style:paragraph-properties fo:margin-left="0cm" fo:margin-right="0cm" fo:text-indent="0cm" style:auto-text-indent="false"/>
    </style:style>
    <style:style style:name="FALAS_2f_ENTREVISTAS" style:display-name="FALAS/ENTREVISTAS" style:family="paragraph" style:parent-style-name="Standard" style:next-style-name="Standard">
      <style:paragraph-properties fo:margin-left="2cm" fo:margin-right="0cm" fo:margin-top="0.635cm" fo:margin-bottom="0.635cm" style:contextual-spacing="true" fo:line-height="100%" fo:text-indent="0cm" style:auto-text-indent="false" style:text-autospace="ideograph-alpha"/>
      <style:text-properties fo:font-style="italic" style:font-name-asian="Calibri" style:font-family-asian="Calibri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ize-complex="11pt"/>
    </style:style>
    <style:style style:name="Parágrafo" style:family="paragraph" style:parent-style-name="Standard">
      <style:paragraph-properties fo:margin-top="0cm" fo:margin-bottom="0cm" style:contextual-spacing="true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pt" fo:country="BR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fo:font-variant="normal" fo:text-transform="none" style:font-name="Arial" fo:font-family="Arial" style:font-family-generic="swiss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text:display="true"/>
    </style:style>
    <style:style style:name="WW8Num7z0" style:family="text">
      <style:text-properties style:font-name="Arial" fo:font-family="Arial" style:font-family-generic="swiss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="Arial" fo:font-family="Arial" style:font-family-generic="swiss" style:font-pitch="variable" fo:font-size="12pt" fo:font-style="normal" fo:font-weight="normal" style:font-size-asian="12pt" style:font-style-asian="normal" style:font-weight-asian="normal" style:font-name-complex="Arial" style:font-family-complex="Arial" style:font-family-generic-complex="swiss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Ref._20_de_20_comentário" style:display-name="Ref. de comentário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Texto_20_de_20_comentário_20_Char" style:display-name="Texto de comentário Char" style:family="text">
      <style:text-properties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ítulo_20_1_20_Char" style:display-name="Título 1 Char" style:family="text">
      <style:text-properties fo:text-transform="uppercase" style:font-name="Arial Negrito" fo:font-family="'Arial Negrito'" style:font-family-generic="swiss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Arial Negrito" style:font-family-complex="'Arial Negrito'" style:font-family-generic-complex="swiss" style:font-size-complex="14pt" style:font-weight-complex="bold"/>
    </style:style>
    <style:style style:name="Título_20_2_20_Char" style:display-name="Título 2 Char" style:family="text"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4pt" style:font-weight-complex="bold"/>
    </style:style>
    <style:style style:name="Footnote_20_Symbol" style:display-name="Footnote Symbol" style:family="text">
      <style:text-properties fo:font-variant="normal" fo:text-transform="none" style:text-line-through-style="none" style:text-line-through-type="none" style:text-position="super 58%" style:font-name="Arial" fo:font-family="Arial" style:font-family-generic="swiss" style:font-pitch="variable" fo:font-size="10pt" fo:font-style="normal" fo:font-weight="normal" style:font-size-asian="10pt" style:font-style-asian="normal" style:font-weight-asian="normal" style:font-name-complex="Arial" style:font-family-complex="Arial" style:font-family-generic-complex="swiss" style:font-pitch-complex="variable"/>
    </style:style>
    <style:style style:name="Texto_20_de_20_nota_20_de_20_rodapé_20_Char" style:display-name="Texto de nota de rodapé Ch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Cabeçalho_20_Char" style:display-name="Cabeçalh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4pt"/>
    </style:style>
    <style:style style:name="Rodapé_20_Char" style:display-name="Rodapé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4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Título_20_4_20_Char" style:display-name="Título 4 Char" style:family="text">
      <style:text-properties fo:color="#5b9bd5" loext:opacity="100%" style:font-name="Calibri Light" fo:font-family="'Calibri Light'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5_20_Char" style:display-name="Título 5 Char" style:family="text">
      <style:text-properties fo:color="#1f4d78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4pt"/>
    </style:style>
    <style:style style:name="Legenda_20_Char" style:display-name="Legenda Char" style:family="text">
      <style:text-properties fo:color="#000000" loext:opacity="100%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9pt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Parágrafo_20_Texto_20_Char" style:display-name="Parágrafo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4pt"/>
    </style:style>
    <style:style style:name="TítuloApend_5f_Anexo_20_Char" style:display-name="TítuloApend_Anexo Char" style:family="text">
      <style:text-properties style:font-name="Arial" fo:font-family="Arial" style:font-family-generic="swiss" style:font-pitch="variable" fo:font-size="12pt" fo:letter-spacing="0.009cm" style:letter-kerning="true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26pt"/>
    </style:style>
    <style:style style:name="Título_20_Char" style:display-name="Título Char" style:family="text">
      <style:text-properties fo:color="#323e4f" loext:opacity="100%" style:font-name="Calibri Light" fo:font-family="'Calibri Light'" style:font-family-generic="swiss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exto_20_de_20_comentário_20_Char1" style:display-name="Texto de comentário Char1" style:family="text">
      <style:text-properties style:font-name="Arial" fo:font-family="Arial" style:font-family-generic="swiss" style:font-pitch="variable" fo:font-size="10pt" style:font-name-asian="Calibri" style:font-family-asian="Calibri" style:font-family-generic-asian="swiss" style:font-pitch-asian="variable" style:font-size-asian="10pt" style:font-name-complex="Comic Sans MS" style:font-family-complex="'Comic Sans MS'" style:font-family-generic-complex="script" style:font-pitch-complex="variable" style:font-size-complex="12pt"/>
    </style:style>
    <style:style style:name="Parágrafo_20_Char" style:display-name="Parágraf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enção_20_Pendente" style:display-name="Menção Pendente" style:family="text">
      <style:text-properties fo:color="#605e5c" loext:opacity="100%" fo:background-color="#e1dfd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2_5f_dracula.Name" style:display-name="ch2_dracula.Name" style:family="text">
      <style:text-properties fo:color="#f8f8f2" loext:opacity="100%"/>
    </style:style>
    <style:style style:name="ch2_5f_dracula.Operator" style:display-name="ch2_dracula.Operator" style:family="text">
      <style:text-properties fo:color="#ff79c6" loext:opacity="100%"/>
    </style:style>
    <style:style style:name="ch2_5f_dracula.Text" style:display-name="ch2_dracula.Text" style:family="text">
      <style:text-properties fo:color="#f8f8f2" loext: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text:style-name="WW8Num1z0" loext:num-list-format="%1%.%2%" style:num-format="1" text:display-levels="2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3" text:style-name="WW8Num1z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z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1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1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1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1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1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55cm" fo:margin-left="1.80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55cm" fo:margin-left="1.80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55cm" fo:margin-left="1.80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55cm" fo:margin-left="1.801cm"/>
        </style:list-level-properties>
      </text:list-level-style-number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right="0cm" fo:text-align="end" style:justify-single-word="false" fo:text-indent="0cm" style:auto-text-indent="false"/>
      <style:text-properties fo:font-size="11pt" style:font-size-asian="11pt" style:font-size-complex="11pt"/>
    </style:style>
    <style:style style:name="MP2" style:family="paragraph" style:parent-style-name="Header">
      <style:paragraph-properties fo:margin-right="0cm" fo:text-indent="0cm" style:auto-text-indent="false"/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0</text:page-number></text:p>
      </style:header>
      <style:header-first>
        <text:p text:style-name="MP2"/>
      </style:header-first>
    </style:master-page>
    <style:master-page style:name="Converter_20_1" style:display-name="Converter 1" style:page-layout-name="Mpm1" draw:style-name="Mdp1">
      <style:header>
        <text:p text:style-name="MP1"><text:page-number text:select-page="current">0</text:page-number></text:p>
      </style:header>
      <style:header-first>
        <text:p text:style-name="MP2"/>
      </style:header-first>
    </style:master-page>
    <style:master-page style:name="Converter_20_2" style:display-name="Converter 2" style:page-layout-name="Mpm1" draw:style-name="Mdp1">
      <style:header>
        <text:p text:style-name="MP1"><text:page-number text:select-page="current">0</text:page-number></text:p>
      </style:header>
      <style:header-first>
        <text:p text:style-name="MP2"/>
      </style:header-first>
    </style:master-page>
    <style:master-page style:name="Converter_20_3" style:display-name="Converter 3" style:page-layout-name="Mpm1" draw:style-name="Mdp1">
      <style:header>
        <text:p text:style-name="MP1"><text:page-number text:select-page="current">19</text:page-number></text:p>
      </style:header>
    </style:master-page>
    <style:master-page style:name="Converter_20_4" style:display-name="Converter 4" style:page-layout-name="Mpm1" draw:style-name="Mdp1">
      <style:header>
        <text:p text:style-name="MP1"><text:page-number text:select-page="current">14</text:page-number></text:p>
      </style:header>
    </style:master-page>
    <style:master-page style:name="Converter_20_5" style:display-name="Converter 5" style:page-layout-name="Mpm1" draw:style-name="Mdp1">
      <style:header>
        <text:p text:style-name="MP1"><text:page-number text:select-page="current">0</text:page-number></text:p>
      </style:header>
    </style:master-page>
    <style:master-page style:name="Converter_20_6" style:display-name="Converter 6" style:page-layout-name="Mpm1" draw:style-name="Mdp1">
      <style:header>
        <text:p text:style-name="MP1"><text:page-number text:select-page="current">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meta:initial-creator>Unisinos</meta:initial-creator>
    <meta:creation-date>2023-05-01T13:03:00</meta:creation-date>
    <dc:date>2025-09-13T11:33:03.137706800</dc:date>
    <meta:editing-cycles>29</meta:editing-cycles>
    <meta:editing-duration>PT2H19M35S</meta:editing-duration>
    <meta:generator>LibreOffice/25.2.5.2$Windows_X86_64 LibreOffice_project/03d19516eb2e1dd5d4ccd751a0d6f35f35e08022</meta:generator>
    <meta:print-date>2025-08-30T17:55:42.680182000</meta:print-date>
    <meta:printed-by>Arquivos PDF</meta:printed-by>
    <meta:document-statistic meta:table-count="0" meta:image-count="12" meta:object-count="0" meta:page-count="20" meta:paragraph-count="186" meta:word-count="1507" meta:character-count="9553" meta:non-whitespace-character-count="8286"/>
  </office:meta>
</office:document-meta>
</file>