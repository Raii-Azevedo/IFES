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4000000E7E592BD0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5.928cm" fo:margin-left="0.018cm" fo:margin-top="0cm" fo:margin-bottom="0cm" table:align="left" style:writing-mode="page"/>
    </style:style>
    <style:style style:name="Tabela1.A" style:family="table-column">
      <style:table-column-properties style:column-width="15.928cm"/>
    </style:style>
    <style:style style:name="Tabela1.1" style:family="table-row">
      <style:table-row-properties style:min-row-height="0.82cm" fo:keep-together="auto"/>
    </style:style>
    <style:style style:name="Tabela1.A1" style:family="table-cell">
      <style:table-cell-properties fo:padding="0.176cm" fo:border="1pt solid #000000"/>
    </style:style>
    <style:style style:name="Tabela1.2" style:family="table-row">
      <style:table-row-properties style:min-row-height="0.741cm" fo:keep-together="auto"/>
    </style:style>
    <style:style style:name="Tabela1.A2" style:family="table-cell">
      <style:table-cell-properties fo:padding="0.176cm" fo:border-left="1pt solid #000000" fo:border-right="1pt solid #000000" fo:border-top="none" fo:border-bottom="1pt solid #000000"/>
    </style:style>
    <style:style style:name="Tabela1.A3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a2" style:family="table">
      <style:table-properties style:width="15.921cm" table:align="margins" style:writing-mode="lr-tb"/>
    </style:style>
    <style:style style:name="Tabela2.A" style:family="table-column">
      <style:table-column-properties style:column-width="3.981cm" style:rel-column-width="16383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fo:margin-top="0.423cm" fo:margin-bottom="0cm" style:contextual-spacing="false" fo:line-height="150%" fo:text-align="center" style:justify-single-word="false" style:page-number="1"/>
      <style:text-properties fo:color="#002060" loext:opacity="100%" style:font-name="Times New Roman" fo:font-size="14pt" fo:font-weight="bold" officeooo:paragraph-rsid="0013c161" style:font-size-asian="14pt" style:font-weight-asian="bold" style:font-size-complex="14pt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Times New Roman" officeooo:paragraph-rsid="0013c161"/>
    </style:style>
    <style:style style:name="P3" style:family="paragraph" style:parent-style-name="Standard">
      <style:paragraph-properties fo:margin-left="0.176cm" fo:margin-right="0.176cm" fo:line-height="150%"/>
      <style:text-properties style:font-name="Times New Roman"/>
    </style:style>
    <style:style style:name="P4" style:family="paragraph" style:parent-style-name="Standard">
      <style:paragraph-properties fo:margin-top="0cm" fo:margin-bottom="0.212cm" style:contextual-spacing="false" fo:line-height="150%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.212cm" style:contextual-spacing="false" fo:line-height="150%" fo:text-align="center" style:justify-single-word="false"/>
      <style:text-properties style:font-name="Times New Roman"/>
    </style:style>
    <style:style style:name="P6" style:family="paragraph" style:parent-style-name="Standard" style:list-style-name="WWNum1">
      <style:paragraph-properties fo:line-height="150%" fo:text-align="justify" style:justify-single-word="false"/>
      <style:text-properties style:font-name="Times New Roman" fo:font-size="12pt" fo:font-weight="bold" officeooo:paragraph-rsid="00125c39" style:font-size-asian="12pt" style:font-weight-asian="bold" style:font-size-complex="12pt" style:font-weight-complex="bold"/>
    </style:style>
    <style:style style:name="P7" style:family="paragraph" style:parent-style-name="Standard" style:list-style-name="WWNum1">
      <style:paragraph-properties fo:line-height="150%" fo:text-align="justify" style:justify-single-word="false"/>
      <style:text-properties style:font-name="Times New Roman" fo:font-size="12pt" fo:font-weight="normal" officeooo:rsid="00125c39" officeooo:paragraph-rsid="00125c39" style:font-size-asian="12pt" style:font-weight-asian="normal" style:font-size-complex="12pt" style:font-weight-complex="normal"/>
    </style:style>
    <style:style style:name="P8" style:family="paragraph" style:parent-style-name="Standard" style:list-style-name="WWNum1">
      <style:paragraph-properties fo:line-height="150%" fo:text-align="justify" style:justify-single-word="false"/>
      <style:text-properties style:font-name="Times New Roman" fo:font-size="12pt" fo:font-weight="bold" officeooo:rsid="00125c39" officeooo:paragraph-rsid="00125c39" style:font-size-asian="12pt" style:font-weight-asian="bold" style:font-size-complex="12pt" style:font-weight-complex="bold"/>
    </style:style>
    <style:style style:name="P9" style:family="paragraph" style:parent-style-name="Standard" style:list-style-name="WWNum1">
      <style:paragraph-properties fo:line-height="150%" fo:text-align="justify" style:justify-single-word="false"/>
      <style:text-properties style:font-name="Times New Roman" fo:font-size="12pt" fo:font-weight="normal" officeooo:paragraph-rsid="00125c39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officeooo:paragraph-rsid="00125c39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normal" officeooo:paragraph-rsid="00125c39" style:font-size-asian="12pt" style:font-weight-asian="normal" style:font-size-complex="12pt" style:font-weight-complex="normal"/>
    </style:style>
    <style:style style:name="P12" style:family="paragraph" style:parent-style-name="Text_20_body" style:list-style-name="L2">
      <style:paragraph-properties fo:line-height="150%" fo:text-align="justify" style:justify-single-word="false"/>
      <style:text-properties fo:font-size="12pt" fo:font-weight="bold" officeooo:paragraph-rsid="00125c39" style:font-size-asian="12pt" style:font-weight-asian="bold" style:font-size-complex="12pt" style:font-weight-complex="bold"/>
    </style:style>
    <style:style style:name="P13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2pt" fo:font-weight="normal" officeooo:paragraph-rsid="00125c39" style:font-size-asian="12pt" style:font-weight-asian="normal" style:font-size-complex="12pt" style:font-weight-complex="normal"/>
    </style:style>
    <style:style style:name="P14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2pt" fo:font-weight="normal" officeooo:paragraph-rsid="00125c39" style:font-size-asian="12pt" style:font-weight-asian="normal" style:font-size-complex="12pt" style:font-weight-complex="normal"/>
    </style:style>
    <style:style style:name="P15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4">
      <style:paragraph-properties fo:line-height="150%" fo:text-align="justify" style:justify-single-word="false"/>
      <style:text-properties style:font-name="Times New Roman" fo:font-size="12pt" fo:font-weight="normal" officeooo:paragraph-rsid="0013c161" style:font-size-asian="12pt" style:font-weight-asian="normal" style:font-size-complex="12pt" style:font-weight-complex="normal"/>
    </style:style>
    <style:style style:name="P17" style:family="paragraph" style:parent-style-name="Text_20_body" style:list-style-name="L4">
      <style:paragraph-properties fo:line-height="150%" fo:text-align="justify" style:justify-single-word="false"/>
      <style:text-properties style:font-name="Times New Roman" fo:font-size="12pt" officeooo:paragraph-rsid="0013c161" style:font-size-asian="12pt" style:font-size-complex="12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3c161" style:font-size-asian="12pt" style:font-size-complex="12pt"/>
    </style:style>
    <style:style style:name="P19" style:family="paragraph" style:parent-style-name="Text_20_body" style:list-style-name="L5">
      <style:paragraph-properties fo:line-height="150%" fo:text-align="justify" style:justify-single-word="false"/>
      <style:text-properties style:font-name="Times New Roman" fo:font-size="12pt" officeooo:paragraph-rsid="0013c161" style:font-size-asian="12pt" style:font-size-complex="12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paragraph-rsid="0013c161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3c161" officeooo:paragraph-rsid="0013c161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2pt" officeooo:rsid="0013c161" officeooo:paragraph-rsid="0013c161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4" style:family="paragraph">
      <loext:graphic-properties draw:fill="solid" draw:fill-color="#1f497d"/>
      <style:paragraph-properties fo:text-align="start"/>
      <style:text-properties fo:font-size="18pt"/>
    </style:style>
    <style:style style:name="T1" style:family="text">
      <style:text-properties fo:color="#002060" loext:opacity="100%" fo:font-size="14pt" fo:font-weight="bold" officeooo:rsid="0013c161" style:font-size-asian="14pt" style:font-weight-asian="bold" style:font-size-complex="14pt"/>
    </style:style>
    <style:style style:name="T2" style:family="text">
      <style:text-properties fo:color="#002060" loext:opacity="100%" fo:font-size="14pt" fo:font-weight="bold" style:font-size-asian="14pt" style:font-weight-asian="bold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normal" officeooo:rsid="00125c39" style:font-weight-asian="normal" style:font-weight-complex="normal"/>
    </style:style>
    <style:style style:name="T5" style:family="text">
      <style:text-properties officeooo:rsid="0013c16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25c39"/>
    </style:style>
    <style:style style:name="T9" style:family="text">
      <style:text-properties style:font-name="Times New Roman" fo:font-size="12pt" fo:font-weight="normal" officeooo:rsid="00125c39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svg:stroke-width="0.026cm" svg:stroke-linecap="butt" draw:fill="solid" draw:fill-color="#1f497d" draw:textarea-vertical-align="top" draw:auto-grow-height="false" fo:min-height="0.101cm" fo:min-width="12.709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 fo:margin-left="0.159cm" fo:margin-right="0.18cm" fo:margin-top="0.053cm" fo:margin-bottom="0.2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dark2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DA DISCIPLINA </text:p>
      <text:p text:style-name="P2"><text:span text:style-name="T1">ANÁLISE E PROJETO DE SISTEMAS</text:span><text:span text:style-name="T2"><text:line-break/>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"><text:span text:style-name="T3">Aluno(a): </text:span><text:span text:style-name="T4">RAISSA DE AZEVEDO</text:span></text:p>
          </table:table-cell>
        </table:table-row>
        <table:table-row table:style-name="Tabela1.2">
          <table:table-cell table:style-name="Tabela1.A2" office:value-type="string">
            <text:p text:style-name="P3"><text:span text:style-name="T3">Curso: <text:s/></text:span><text:span text:style-name="T4">SISTEMAS DE INFORMAÇÃO</text:span></text:p>
          </table:table-cell>
        </table:table-row>
        <table:table-row table:style-name="Tabela1.2">
          <table:table-cell table:style-name="Tabela1.A3" office:value-type="string">
            <text:p text:style-name="P3"><text:span text:style-name="T3">Disciplina: </text:span><text:span text:style-name="T4">ANÁLISE E PROJETO DE SISTEMAS</text:span></text:p>
          </table:table-cell>
        </table:table-row>
      </table:table>
      <text:p text:style-name="P4"/>
      <text:p text:style-name="P5"><text:span text:style-name="T2">Atividade</text:span></text:p>
      <text:list xml:id="list183222436" text:style-name="WWNum1">
        <text:list-item>
          <text:p text:style-name="P6">O que é uma classe no contexto de análise orientada a objetos? Cite e explique! </text:p>
          <text:p text:style-name="P7">Classe é um<text:span text:style-name="T5">a</text:span> estrutura que define um conjunto de objetos com características semelhantes. E funciona como um modelo descrito:</text:p>
          <text:list>
            <text:list-item>
              <text:p text:style-name="P8">Atributos – <text:span text:style-name="T6">Dados que caracterizam o objeto (Ex. Nome, Preço, Data)</text:span></text:p>
            </text:list-item>
            <text:list-item>
              <text:p text:style-name="P8">Método – <text:span text:style-name="T6">Ações que o objeto pode executar (Ex. Calcular desconto, atualizar o estoque).</text:span></text:p>
              <text:p text:style-name="P7"/>
            </text:list-item>
          </text:list>
        </text:list-item>
        <text:list-item>
          <text:p text:style-name="P6">O que é uma user story (história de usuário)? Cite e explique! </text:p>
          <text:p text:style-name="P7"><text:span text:style-name="T7">User Story</text:span> é uma descrição breve e simples de um<text:span text:style-name="T5">a</text:span> necessidade do usuário final, escrita do ponto de vista de quem utiliza o sistema. Técnica muito utilizada em metodologia ágeis (Ex. <text:span text:style-name="T7">Scrum</text:span>)</text:p>
          <text:p text:style-name="P7"/>
        </text:list-item>
        <text:list-item>
          <text:p text:style-name="P6">Analise o requisito a seguir: R1 - Cada venda realizada possuirá um valor total e um desconto que pode ou não ser aplicado. A partir deste requisito, é possível identificar qual(is) classe(s)? </text:p>
          <text:p text:style-name="P7">A Classe é venda, que pode ter como atributos? O valor total, o desconto e o valor final (com desconto).</text:p>
          <text:p text:style-name="P6"/>
        </text:list-item>
        <text:list-item>
          <text:p text:style-name="P6">Quais são as tarefas primárias para a análise orientada a objetos? </text:p>
          <text:p text:style-name="P9">As <text:span text:style-name="T8">principais</text:span> tarefas pri<text:span text:style-name="T8">márias</text:span> incluem:</text:p>
        </text:list-item>
      </text:list>
      <text:list text:style-name="L1">
        <text:list-item>
          <text:p text:style-name="P10"><text:span text:style-name="Strong_20_Emphasis"><text:span text:style-name="T9">I</text:span></text:span><text:span text:style-name="Strong_20_Emphasis"><text:span text:style-name="T10">dentificação de classes e objet</text:span></text:span><text:span text:style-name="Strong_20_Emphasis"><text:span text:style-name="T9">o</text:span></text:span></text:p>
          <text:p text:style-name="P11">Encontrar os elementos principais do sistema (ex: Cliente, Produto, Venda).</text:p>
          <text:p text:style-name="P11"><text:soft-page-break/></text:p>
        </text:list-item>
      </text:list>
      <text:list text:style-name="L2">
        <text:list-item>
          <text:p text:style-name="P12"><text:span text:style-name="Strong_20_Emphasis"><text:span text:style-name="T11">Identificação de atributos e métodos.</text:span></text:span></text:p>
          <text:p text:style-name="P13">Definir as propriedades e comportamentos de cada classe.</text:p>
          <text:p text:style-name="P13"/>
        </text:list-item>
        <text:list-item>
          <text:p text:style-name="P12"><text:span text:style-name="Strong_20_Emphasis"><text:span text:style-name="T11">Identificação de relacionamentos. </text:span></text:span></text:p>
          <text:p text:style-name="P12"><text:span text:style-name="T11">Como as classes se conectam (ex: Cliente </text:span><text:span text:style-name="Emphasis"><text:span text:style-name="T11">realiza</text:span></text:span><text:span text:style-name="T11"> Venda; Venda </text:span><text:span text:style-name="Emphasis"><text:span text:style-name="T11">contém</text:span></text:span><text:span text:style-name="T11"> Produtos).</text:span></text:p>
          <text:p text:style-name="P13"/>
        </text:list-item>
        <text:list-item>
          <text:p text:style-name="P12"><text:span text:style-name="Strong_20_Emphasis"><text:span text:style-name="T11">Modelagem com diagramas (como o de classes)</text:span></text:span></text:p>
          <text:p text:style-name="P13">Representar graficamente as relações e atributos.</text:p>
          <text:p text:style-name="P13"/>
        </text:list-item>
        <text:list-item>
          <text:p text:style-name="P12"><text:span text:style-name="Strong_20_Emphasis"><text:span text:style-name="T11">Documentação dos requisitos e comportamentos</text:span></text:span></text:p>
          <text:p text:style-name="P13">Criar descrições detalhadas de cada classe e suas responsabilidades.</text:p>
        </text:list-item>
      </text:list>
      <text:list xml:id="list110434276335625" text:continue-list="list183222436" text:style-name="WWNum1">
        <text:list-header>
          <text:p text:style-name="P6"/>
          <text:p text:style-name="P6"/>
        </text:list-header>
        <text:list-item>
          <text:p text:style-name="P6">Levando em consideração o modelo abaixo e suas respectivas etapas, faça: </text:p>
          <text:list>
            <text:list-item>
              <text:p text:style-name="P6">Determine um projeto. Ele pode ser fictício (Controle de custos, Venda de passagens aéreas, Venda de produto em supermercado etc.) </text:p>
              <text:p text:style-name="P9">Um Sistema de Controle de Vendas no Supermercado</text:p>
              <text:p text:style-name="P9"/>
            </text:list-item>
            <text:list-item>
              <text:p text:style-name="P6">Identifique potenciais problemas e posteriormente faça uma análise dele. Veja as potencialidades e o que pode vir a acarretar;</text:p>
              <text:p text:style-name="P9">Problemas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Falhas no cálculo do valor total quando há muitos itens.</text:p>
                        </text:list-item>
                        <text:list-item>
                          <text:p text:style-name="P15">Descontos aplicados incorretamente.</text:p>
                        </text:list-item>
                        <text:list-item>
                          <text:p text:style-name="P15">Dificuldade de rastrear vendas por cliente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0435100085995" text:continue-list="list110434276335625" text:style-name="WWNum1">
        <text:list-item>
          <text:list>
            <text:list-header>
              <text:p text:style-name="P9">Potencialidades:</text:p>
            </text:list-header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Aumenta o controle sobre vendas e descontos.</text:p>
                        </text:list-item>
                        <text:list-item>
                          <text:p text:style-name="P17">Facilita geração de relatórios financeiros.</text:p>
                        </text:list-item>
                        <text:list-item>
                          <text:p text:style-name="P17"><text:soft-page-break/>Melhora a experiência do cliente (nota rápida, desconto automático)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tab/><text:tab/><text:span text:style-name="T5">Consequências (em caso de um projeto ineficiente)</text:span></text:p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Erros nos preços e nos relatórios.</text:p>
                        </text:list-item>
                        <text:list-item>
                          <text:p text:style-name="P19">Perda de confiança dos clientes.</text:p>
                        </text:list-item>
                        <text:list-item>
                          <text:p text:style-name="P19">Dificuldade na auditoria e controle de estoque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text:continue-list="list110435100085995" text:style-name="WWNum1">
        <text:list-item>
          <text:list>
            <text:list-item>
              <text:p text:style-name="P6">Faça a identificação de classes e,; </text:p>
            </text:list-item>
          </text:list>
        </text:list-item>
      </text:list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21">Classe</text:p>
          </table:table-cell>
          <table:table-cell table:style-name="Tabela2.A1" office:value-type="string">
            <text:p text:style-name="P21">Principais Atributos</text:p>
          </table:table-cell>
          <table:table-cell table:style-name="Tabela2.A1" office:value-type="string">
            <text:p text:style-name="P21">Métodos</text:p>
          </table:table-cell>
          <table:table-cell table:style-name="Tabela2.D1" office:value-type="string">
            <text:p text:style-name="P21">Relacionamento</text:p>
          </table:table-cell>
        </table:table-row>
        <table:table-row>
          <table:table-cell table:style-name="Tabela2.A2" office:value-type="string">
            <text:p text:style-name="P22">Produto</text:p>
          </table:table-cell>
          <table:table-cell table:style-name="Tabela2.A2" office:value-type="string">
            <text:p text:style-name="P23">idProduto, nome, preçoUnitário, estoque </text:p>
          </table:table-cell>
          <table:table-cell table:style-name="Tabela2.A2" office:value-type="string">
            <text:p text:style-name="P23">atualizarEstoque(), calcularPreço() </text:p>
          </table:table-cell>
          <table:table-cell table:style-name="Tabela2.D2" office:value-type="string">
            <text:p text:style-name="P23">Um Produto pode estar em várias Vendas </text:p>
          </table:table-cell>
        </table:table-row>
        <table:table-row>
          <table:table-cell table:style-name="Tabela2.A2" office:value-type="string">
            <text:p text:style-name="P22">Cliente</text:p>
          </table:table-cell>
          <table:table-cell table:style-name="Tabela2.A2" office:value-type="string">
            <text:p text:style-name="P23">idCliente, nome, CPF </text:p>
          </table:table-cell>
          <table:table-cell table:style-name="Tabela2.A2" office:value-type="string">
            <text:p text:style-name="P23">atualizarCadastro() </text:p>
          </table:table-cell>
          <table:table-cell table:style-name="Tabela2.D2" office:value-type="string">
            <text:p text:style-name="P23">Um Cliente realiza várias Vendas </text:p>
          </table:table-cell>
        </table:table-row>
        <table:table-row>
          <table:table-cell table:style-name="Tabela2.A2" office:value-type="string">
            <text:p text:style-name="P22">Venda</text:p>
          </table:table-cell>
          <table:table-cell table:style-name="Tabela2.A2" office:value-type="string">
            <text:p text:style-name="P23">idVenda, data, valorTotal, desconto </text:p>
          </table:table-cell>
          <table:table-cell table:style-name="Tabela2.A2" office:value-type="string">
            <text:p text:style-name="P23">calcularTotal(), aplicarDesconto() </text:p>
          </table:table-cell>
          <table:table-cell table:style-name="Tabela2.D2" office:value-type="string">
            <text:p text:style-name="P23">Uma Venda pertence a um Cliente e contém Produtos </text:p>
          </table:table-cell>
        </table:table-row>
        <table:table-row>
          <table:table-cell table:style-name="Tabela2.A2" office:value-type="string">
            <text:p text:style-name="P22">Item Venda</text:p>
          </table:table-cell>
          <table:table-cell table:style-name="Tabela2.A2" office:value-type="string">
            <text:p text:style-name="P23">quantidade, subtotal </text:p>
          </table:table-cell>
          <table:table-cell table:style-name="Tabela2.A2" office:value-type="string">
            <text:p text:style-name="P23">calcularSubtotal() </text:p>
          </table:table-cell>
          <table:table-cell table:style-name="Tabela2.D2" office:value-type="string">
            <text:p text:style-name="P23">Uma Venda pertence a um Cliente e contém Produtos </text:p>
          </table:table-cell>
        </table:table-row>
      </table:table>
      <text:list text:continue-numbering="true" text:style-name="WWNum1">
        <text:list-item>
          <text:list>
            <text:list-header>
              <text:p text:style-name="P9"/>
            </text:list-header>
            <text:list-item>
              <text:p text:style-name="P6">Posteriormente a documentação conforme relatada no modelo de nº 4.</text:p>
            </text:list-item>
            <text:list-item>
              <text:p text:style-name="P6">O relato e confecção do documento pode ser textual (de fácil descrição...)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>
      <loext:graphic-properties draw:fill="solid" draw:fill-color="#1f497d"/>
      <style:paragraph-properties fo:text-align="start"/>
      <style:text-properties fo:font-size="18pt"/>
    </style:style>
    <style:style style:name="MP2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none" svg:stroke-width="0.026cm" svg:stroke-linecap="butt" draw:fill="solid" draw:fill-color="#1f497d" draw:textarea-vertical-align="top" draw:auto-grow-height="false" fo:min-height="0.101cm" fo:min-width="12.709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 fo:margin-left="0.159cm" fo:margin-right="0.18cm" fo:margin-top="0.053cm" fo:margin-bottom="0.2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dark2" loext:color-type="theme"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custom-shape text:anchor-type="char" draw:z-index="5" draw:name="Retângulo 1" draw:style-name="Mgr1" draw:text-style-name="MP1" svg:width="13.209cm" svg:height="0.35cm" svg:x="3.948cm" svg:y="0.48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1" text:anchor-type="char" svg:x="-0.783cm" svg:y="-0.201cm" svg:width="4.741cm" svg:height="1.261cm" draw:z-index="2"><draw:image xlink:href="Pictures/1000000100000364000000E7E592BD09.png" xlink:type="simple" xlink:show="embed" xlink:actuate="onLoad" draw:mime-type="image/png"/><svg:desc>Forma

Descrição gerada automaticamente com confiança baixa</svg:desc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lly Frimmel</meta:initial-creator>
    <meta:editing-cycles>9</meta:editing-cycles>
    <meta:creation-date>2024-05-01T13:10:00</meta:creation-date>
    <dc:date>2025-11-02T11:04:33.179456800</dc:date>
    <meta:editing-duration>PT27M5S</meta:editing-duration>
    <meta:generator>LibreOffice/25.2.6.2$Windows_X86_64 LibreOffice_project/729c5bfe710f5eb71ed3bbde9e06a6065e9c6c5d</meta:generator>
    <meta:document-statistic meta:table-count="2" meta:image-count="1" meta:object-count="0" meta:page-count="3" meta:paragraph-count="69" meta:word-count="509" meta:character-count="3250" meta:non-whitespace-character-count="2813"/>
    <meta:user-defined meta:name="AppVersion">16.0000</meta:user-defined>
    <meta:template xlink:type="simple" xlink:actuate="onRequest" xlink:title="Normal" xlink:href=""/>
  </office:meta>
</office:document-meta>
</file>